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567"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8"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569"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570"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571"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572"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573"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574"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575"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576"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577"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578"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579"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58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81" style:family="paragraph" style:parent-style-name="Text_20_body">
      <style:paragraph-properties style:line-height-at-least="0.635cm" fo:text-align="start" style:justify-single-word="false"/>
      <style:text-properties officeooo:paragraph-rsid="0291261e"/>
    </style:style>
    <style:style style:name="P5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5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5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5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5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5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5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589"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59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59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592"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59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594"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59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59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59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P598" style:family="paragraph" style:parent-style-name="Heading_20_3">
      <style:paragraph-properties style:line-height-at-least="0.635cm" fo:text-align="center" style:justify-single-word="false"/>
      <style:text-properties officeooo:paragraph-rsid="02a62fe0"/>
    </style:style>
    <style:style style:name="P599" style:family="paragraph" style:parent-style-name="Text_20_body">
      <style:paragraph-properties style:line-height-at-least="0.635cm" fo:text-align="center" style:justify-single-word="false"/>
      <style:text-properties officeooo:paragraph-rsid="02a62fe0"/>
    </style:style>
    <style:style style:name="P600" style:family="paragraph" style:parent-style-name="Text_20_body">
      <style:paragraph-properties style:line-height-at-least="0.199cm" fo:text-align="center" style:justify-single-word="false"/>
      <style:text-properties fo:color="#cccccc" loext:opacity="100%" style:font-name="Droid Sans Mono" fo:font-size="13.5pt" fo:font-weight="normal" officeooo:rsid="011482c8" officeooo:paragraph-rsid="02c8c2b3" fo:background-color="#1f1f1f"/>
    </style:style>
    <style:style style:name="P60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8c2b3" fo:background-color="#1f1f1f"/>
    </style:style>
    <style:style style:name="P60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39cb" fo:background-color="#1f1f1f"/>
    </style:style>
    <style:style style:name="P60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8055" fo:background-color="#1f1f1f"/>
    </style:style>
    <style:style style:name="P60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77b72" fo:background-color="#1f1f1f"/>
    </style:style>
    <style:style style:name="P60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1f10" fo:background-color="#1f1f1f"/>
    </style:style>
    <style:style style:name="P60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6161" fo:background-color="#1f1f1f"/>
    </style:style>
    <style:style style:name="P60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a2071" fo:background-color="#1f1f1f"/>
    </style:style>
    <style:style style:name="P60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b4df4" fo:background-color="#1f1f1f"/>
    </style:style>
    <style:style style:name="P60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61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bdc43" fo:background-color="#1f1f1f"/>
    </style:style>
    <style:style style:name="P61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61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665d" fo:background-color="#1f1f1f"/>
    </style:style>
    <style:style style:name="P61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74098" fo:background-color="#1f1f1f"/>
    </style:style>
    <style:style style:name="P61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43c6d" fo:background-color="#1f1f1f"/>
    </style:style>
    <style:style style:name="P61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51332" fo:background-color="#1f1f1f"/>
    </style:style>
    <style:style style:name="P61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909b" fo:background-color="#1f1f1f"/>
    </style:style>
    <style:style style:name="P61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ae5f" fo:background-color="#1f1f1f"/>
    </style:style>
    <style:style style:name="P61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a09ff" fo:background-color="#1f1f1f"/>
    </style:style>
    <style:style style:name="P61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c08e" fo:background-color="#1f1f1f"/>
    </style:style>
    <style:style style:name="P62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328f0" fo:background-color="#1f1f1f"/>
    </style:style>
    <style:style style:name="P62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3561b" fo:background-color="#1f1f1f"/>
    </style:style>
    <style:style style:name="P62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55e0f" fo:background-color="#1f1f1f"/>
    </style:style>
    <style:style style:name="P62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4a78b" fo:background-color="#1f1f1f"/>
    </style:style>
    <style:style style:name="P62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d64b" fo:background-color="#1f1f1f"/>
    </style:style>
    <style:style style:name="P62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1ba00" fo:background-color="#1f1f1f"/>
    </style:style>
    <style:style style:name="P62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e5da0" fo:background-color="#1f1f1f"/>
    </style:style>
    <style:style style:name="P62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6c6f9" fo:background-color="#1f1f1f"/>
    </style:style>
    <style:style style:name="P62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8606f" fo:background-color="#1f1f1f"/>
    </style:style>
    <style:style style:name="P62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a5741" fo:background-color="#1f1f1f"/>
    </style:style>
    <style:style style:name="P63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7935" fo:background-color="#1f1f1f"/>
    </style:style>
    <style:style style:name="P63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63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63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c8cb" fo:background-color="#1f1f1f"/>
    </style:style>
    <style:style style:name="P63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50d8" fo:background-color="#1f1f1f"/>
    </style:style>
    <style:style style:name="P63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ba75" fo:background-color="#1f1f1f"/>
    </style:style>
    <style:style style:name="P63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aae4e" fo:background-color="#1f1f1f"/>
    </style:style>
    <style:style style:name="P63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c6828" fo:background-color="#1f1f1f"/>
    </style:style>
    <style:style style:name="P63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bffd1" fo:background-color="#1f1f1f"/>
    </style:style>
    <style:style style:name="P63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2f2" fo:background-color="#1f1f1f"/>
    </style:style>
    <style:style style:name="P64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65f" fo:background-color="#1f1f1f"/>
    </style:style>
    <style:style style:name="P64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895f" fo:background-color="#1f1f1f"/>
    </style:style>
    <style:style style:name="P64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643" style:family="paragraph" style:parent-style-name="Text_20_body">
      <style:paragraph-properties style:line-height-at-least="0.199cm" fo:text-align="start" style:justify-single-word="false"/>
      <style:text-properties fo:color="#cccccc" loext:opacity="100%" style:font-name="Droid Sans Mono" fo:font-size="13.5pt" fo:language="en" fo:country="US" fo:font-weight="normal" officeooo:rsid="02bd949a" officeooo:paragraph-rsid="02bd949a" fo:background-color="transparent"/>
    </style:style>
    <style:style style:name="P64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9cd8" fo:background-color="#1f1f1f"/>
    </style:style>
    <style:style style:name="P645" style:family="paragraph" style:parent-style-name="Preformatted_20_Text">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646" style:family="paragraph" style:parent-style-name="Preformatted_20_Text">
      <style:paragraph-properties fo:margin-top="0cm" fo:margin-bottom="0.499cm" style:contextual-spacing="false"/>
    </style:style>
    <style:style style:name="P64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c523b"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style:style style:name="T563" style:family="text">
      <style:text-properties fo:color="#000000" loext:opacity="100%" style:font-name="Arial" fo:font-size="18pt" fo:language="en" fo:country="US" officeooo:rsid="02808f7a" fo:background-color="#ff8000" loext:char-shading-value="0" style:font-size-asian="18pt" style:font-size-complex="18pt"/>
    </style:style>
    <style:style style:name="T564" style:family="text">
      <style:text-properties fo:color="#000000" loext:opacity="100%" style:font-name="Arial" fo:font-size="12pt" fo:language="en" fo:country="US" officeooo:rsid="02808f7a" fo:background-color="#ff8000" loext:char-shading-value="0" style:font-size-asian="10.5pt" style:font-size-complex="12pt"/>
    </style:style>
    <style:style style:name="T565" style:family="text">
      <style:text-properties fo:color="#ffffff" loext:opacity="100%" fo:language="en" fo:country="US" officeooo:rsid="02808f7a" fo:background-color="transparent" loext:char-shading-value="0"/>
    </style:style>
    <style:style style:name="T566" style:family="text">
      <style:text-properties fo:language="en" fo:country="US" officeooo:rsid="02808f7a" fo:background-color="transparent" loext:char-shading-value="0"/>
    </style:style>
    <style:style style:name="T567" style:family="text">
      <style:text-properties fo:color="#000000" loext:opacity="100%" style:font-name="Arial" fo:font-size="12pt" fo:language="en" fo:country="US" officeooo:rsid="028819fd" fo:background-color="#ff8000" loext:char-shading-value="0" style:font-size-asian="10.5pt" style:font-size-complex="12pt"/>
    </style:style>
    <style:style style:name="T568" style:family="text">
      <style:text-properties fo:language="en" fo:country="US" officeooo:rsid="02823adc" fo:background-color="transparent" loext:char-shading-value="0"/>
    </style:style>
    <style:style style:name="T569" style:family="text">
      <style:text-properties fo:language="en" fo:country="US" officeooo:rsid="0282aa7c" fo:background-color="transparent" loext:char-shading-value="0"/>
    </style:style>
    <style:style style:name="T570" style:family="text">
      <style:text-properties fo:color="#ffffff" loext:opacity="100%" fo:language="en" fo:country="US" officeooo:rsid="0282aa7c" fo:background-color="transparent" loext:char-shading-value="0"/>
    </style:style>
    <style:style style:name="T571" style:family="text">
      <style:text-properties fo:language="en" fo:country="US" officeooo:rsid="02872b30" fo:background-color="transparent" loext:char-shading-value="0"/>
    </style:style>
    <style:style style:name="T572" style:family="text">
      <style:text-properties fo:color="#ffffff" loext:opacity="100%" fo:language="en" fo:country="US" officeooo:rsid="02835437" fo:background-color="transparent" loext:char-shading-value="0"/>
    </style:style>
    <style:style style:name="T573" style:family="text">
      <style:text-properties fo:language="en" fo:country="US" officeooo:rsid="02835437" fo:background-color="transparent" loext:char-shading-value="0"/>
    </style:style>
    <style:style style:name="T574" style:family="text">
      <style:text-properties fo:color="#ffffff" loext:opacity="100%" fo:language="en" fo:country="US" officeooo:rsid="0285e823" fo:background-color="transparent" loext:char-shading-value="0"/>
    </style:style>
    <style:style style:name="T575" style:family="text">
      <style:text-properties fo:language="en" fo:country="US" officeooo:rsid="0285e823" fo:background-color="transparent" loext:char-shading-value="0"/>
    </style:style>
    <style:style style:name="T576" style:family="text">
      <style:text-properties fo:color="#ffffff" loext:opacity="100%" fo:language="en" fo:country="US" officeooo:rsid="028819fd" fo:background-color="transparent" loext:char-shading-value="0"/>
    </style:style>
    <style:style style:name="T577" style:family="text">
      <style:text-properties fo:color="#ffffff" loext:opacity="100%" fo:language="en" fo:country="US" officeooo:rsid="028832b8" fo:background-color="transparent" loext:char-shading-value="0"/>
    </style:style>
    <style:style style:name="T578" style:family="text">
      <style:text-properties fo:language="en" fo:country="US" officeooo:rsid="028832b8" fo:background-color="transparent" loext:char-shading-value="0"/>
    </style:style>
    <style:style style:name="T579" style:family="text">
      <style:text-properties fo:language="en" fo:country="US" officeooo:rsid="0289f25b" fo:background-color="transparent" loext:char-shading-value="0"/>
    </style:style>
    <style:style style:name="T580" style:family="text">
      <style:text-properties fo:color="#ffffff" loext:opacity="100%" fo:language="en" fo:country="US" officeooo:rsid="0289f25b" fo:background-color="transparent" loext:char-shading-value="0"/>
    </style:style>
    <style:style style:name="T581" style:family="text">
      <style:text-properties fo:color="#ffffff" loext:opacity="100%" fo:language="en" fo:country="US" officeooo:rsid="028bb4cf" fo:background-color="transparent" loext:char-shading-value="0"/>
    </style:style>
    <style:style style:name="T582" style:family="text">
      <style:text-properties fo:language="en" fo:country="US" officeooo:rsid="028bb4cf" fo:background-color="transparent" loext:char-shading-value="0"/>
    </style:style>
    <style:style style:name="T583" style:family="text">
      <style:text-properties fo:language="en" fo:country="US" officeooo:rsid="028d6099" fo:background-color="transparent" loext:char-shading-value="0"/>
    </style:style>
    <style:style style:name="T584" style:family="text">
      <style:text-properties fo:color="#ffffff" loext:opacity="100%" fo:language="en" fo:country="US" officeooo:rsid="028d6099" fo:background-color="transparent" loext:char-shading-value="0"/>
    </style:style>
    <style:style style:name="T585" style:family="text">
      <style:text-properties fo:color="#ffffff" loext:opacity="100%" fo:language="en" fo:country="US" officeooo:rsid="028f5ec4" fo:background-color="transparent" loext:char-shading-value="0"/>
    </style:style>
    <style:style style:name="T586" style:family="text">
      <style:text-properties fo:language="en" fo:country="US" officeooo:rsid="028f5ec4" fo:background-color="transparent" loext:char-shading-value="0"/>
    </style:style>
    <style:style style:name="T587" style:family="text">
      <style:text-properties fo:color="#000000" loext:opacity="100%" style:font-name="Arial" fo:font-size="12pt" fo:language="en" fo:country="US" officeooo:rsid="028fd998" fo:background-color="#ff8000" loext:char-shading-value="0" style:font-size-asian="10.5pt" style:font-size-complex="12pt"/>
    </style:style>
    <style:style style:name="T588" style:family="text">
      <style:text-properties fo:color="#ffffff" loext:opacity="100%" fo:language="en" fo:country="US" officeooo:rsid="028fd998" fo:background-color="transparent" loext:char-shading-value="0"/>
    </style:style>
    <style:style style:name="T589" style:family="text">
      <style:text-properties fo:language="en" fo:country="US" officeooo:rsid="028fd998" fo:background-color="transparent" loext:char-shading-value="0"/>
    </style:style>
    <style:style style:name="T590" style:family="text">
      <style:text-properties fo:color="#ffffff" loext:opacity="100%" style:font-name="Arial" fo:font-size="18pt" fo:language="en" fo:country="US" officeooo:rsid="0291261e" fo:background-color="#00a933" loext:char-shading-value="0" style:font-size-asian="18pt" style:font-size-complex="18pt"/>
    </style:style>
    <style:style style:name="T591"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592" style:family="text">
      <style:text-properties fo:color="#ffffff" loext:opacity="100%" fo:language="en" fo:country="US" officeooo:rsid="0292a7b0" fo:background-color="transparent" loext:char-shading-value="0"/>
    </style:style>
    <style:style style:name="T593"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594" style:family="text">
      <style:text-properties fo:color="#ffffff" loext:opacity="100%" fo:language="en" fo:country="US" officeooo:rsid="029350eb" fo:background-color="transparent" loext:char-shading-value="0"/>
    </style:style>
    <style:style style:name="T595" style:family="text">
      <style:text-properties fo:color="#ffffff" loext:opacity="100%" fo:language="en" fo:country="US" officeooo:rsid="029383c6" fo:background-color="transparent" loext:char-shading-value="0"/>
    </style:style>
    <style:style style:name="T596"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597" style:family="text">
      <style:text-properties fo:color="#ff0000" loext:opacity="100%" fo:language="en" fo:country="US" fo:background-color="transparent" loext:char-shading-value="0"/>
    </style:style>
    <style:style style:name="T598" style:family="text">
      <style:text-properties fo:color="#ff0000" loext:opacity="100%" fo:language="en" fo:country="US" officeooo:rsid="029383c6" fo:background-color="transparent" loext:char-shading-value="0"/>
    </style:style>
    <style:style style:name="T599" style:family="text">
      <style:text-properties fo:language="en" fo:country="US" officeooo:rsid="029383c6" fo:background-color="transparent" loext:char-shading-value="0"/>
    </style:style>
    <style:style style:name="T600" style:family="text">
      <style:text-properties fo:color="#ffffff" loext:opacity="100%" fo:language="en" fo:country="US" officeooo:rsid="0294f9c4" fo:background-color="transparent" loext:char-shading-value="0"/>
    </style:style>
    <style:style style:name="T601" style:family="text">
      <style:text-properties fo:color="#ffffff" loext:opacity="100%" fo:language="en" fo:country="US" officeooo:rsid="029595bf" fo:background-color="transparent" loext:char-shading-value="0"/>
    </style:style>
    <style:style style:name="T602"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603" style:family="text">
      <style:text-properties fo:color="#ffffff" loext:opacity="100%" fo:language="en" fo:country="US" officeooo:rsid="02960efb" fo:background-color="transparent" loext:char-shading-value="0"/>
    </style:style>
    <style:style style:name="T604"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605" style:family="text">
      <style:text-properties fo:language="en" fo:country="US" officeooo:rsid="02977766" fo:background-color="transparent" loext:char-shading-value="0"/>
    </style:style>
    <style:style style:name="T606" style:family="text">
      <style:text-properties fo:color="#ff0000" loext:opacity="100%" fo:language="en" fo:country="US" officeooo:rsid="02977766" fo:background-color="transparent" loext:char-shading-value="0"/>
    </style:style>
    <style:style style:name="T607" style:family="text">
      <style:text-properties fo:color="#ffffff" loext:opacity="100%" fo:language="en" fo:country="US" officeooo:rsid="02977766" fo:background-color="transparent" loext:char-shading-value="0"/>
    </style:style>
    <style:style style:name="T608"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609" style:family="text">
      <style:text-properties fo:color="#ffffff" loext:opacity="100%" style:font-name="Arial" fo:font-size="12pt" fo:language="en" fo:country="US" officeooo:rsid="029ac031" fo:background-color="#00a933" loext:char-shading-value="0" style:font-size-asian="10.5pt" style:font-size-complex="12pt"/>
    </style:style>
    <style:style style:name="T610" style:family="text">
      <style:text-properties fo:color="#ffffff" loext:opacity="100%" style:font-name="Arial" fo:font-size="12pt" fo:language="en" fo:country="US" officeooo:rsid="02a482a4" fo:background-color="#00a933" loext:char-shading-value="0" style:font-size-asian="10.5pt" style:font-size-complex="12pt"/>
    </style:style>
    <style:style style:name="T611" style:family="text">
      <style:text-properties fo:color="#ffffff" loext:opacity="100%" fo:language="en" fo:country="US" officeooo:rsid="029ac031" fo:background-color="transparent" loext:char-shading-value="0"/>
    </style:style>
    <style:style style:name="T612" style:family="text">
      <style:text-properties fo:color="#ffffff" loext:opacity="100%" fo:language="en" fo:country="US" officeooo:rsid="029ae416" fo:background-color="transparent" loext:char-shading-value="0"/>
    </style:style>
    <style:style style:name="T613" style:family="text">
      <style:text-properties fo:language="en" fo:country="US" officeooo:rsid="029ae416" fo:background-color="transparent" loext:char-shading-value="0"/>
    </style:style>
    <style:style style:name="T614" style:family="text">
      <style:text-properties fo:language="en" fo:country="US" officeooo:rsid="029ac031" fo:background-color="transparent" loext:char-shading-value="0"/>
    </style:style>
    <style:style style:name="T615" style:family="text">
      <style:text-properties fo:color="#ffffff" loext:opacity="100%" style:font-name="Arial" fo:font-size="12pt" fo:language="en" fo:country="US" officeooo:rsid="029f0845" fo:background-color="#00a933" loext:char-shading-value="0" style:font-size-asian="10.5pt" style:font-size-complex="12pt"/>
    </style:style>
    <style:style style:name="T616" style:family="text">
      <style:text-properties fo:color="#ffffff" loext:opacity="100%" fo:language="en" fo:country="US" officeooo:rsid="029f0845" fo:background-color="transparent" loext:char-shading-value="0"/>
    </style:style>
    <style:style style:name="T617" style:family="text">
      <style:text-properties fo:language="en" fo:country="US" officeooo:rsid="029f0845" fo:background-color="transparent" loext:char-shading-value="0"/>
    </style:style>
    <style:style style:name="T618" style:family="text">
      <style:text-properties fo:color="#ffffff" loext:opacity="100%" style:font-name="Arial" fo:font-size="12pt" fo:language="en" fo:country="US" officeooo:rsid="029f7aab" fo:background-color="#00a933" loext:char-shading-value="0" style:font-size-asian="10.5pt" style:font-size-complex="12pt"/>
    </style:style>
    <style:style style:name="T619" style:family="text">
      <style:text-properties fo:color="#ffffff" loext:opacity="100%" fo:language="en" fo:country="US" officeooo:rsid="029f7aab" fo:background-color="transparent" loext:char-shading-value="0"/>
    </style:style>
    <style:style style:name="T620" style:family="text">
      <style:text-properties fo:language="en" fo:country="US" officeooo:rsid="029f7aab" fo:background-color="transparent" loext:char-shading-value="0"/>
    </style:style>
    <style:style style:name="T621" style:family="text">
      <style:text-properties fo:language="en" fo:country="US" officeooo:rsid="02a02f21" fo:background-color="transparent" loext:char-shading-value="0"/>
    </style:style>
    <style:style style:name="T622" style:family="text">
      <style:text-properties fo:language="en" fo:country="US" officeooo:rsid="02a266a9" fo:background-color="transparent" loext:char-shading-value="0"/>
    </style:style>
    <style:style style:name="T623" style:family="text">
      <style:text-properties fo:color="#ffffff" loext:opacity="100%" fo:language="en" fo:country="US" officeooo:rsid="02a2bbe0" fo:background-color="transparent" loext:char-shading-value="0"/>
    </style:style>
    <style:style style:name="T624" style:family="text">
      <style:text-properties fo:color="#ffffff" loext:opacity="100%" fo:language="en" fo:country="US" officeooo:rsid="02a5eca8" fo:background-color="transparent" loext:char-shading-value="0"/>
    </style:style>
    <style:style style:name="T625" style:family="text">
      <style:text-properties fo:color="#000000" loext:opacity="100%" style:font-name="Arial" fo:font-size="18pt" fo:language="en" fo:country="US" fo:font-weight="normal" officeooo:rsid="02a62fe0" fo:background-color="#ffff00" loext:char-shading-value="0" style:font-size-asian="18pt" style:font-size-complex="18pt"/>
    </style:style>
    <style:style style:name="T626" style:family="text">
      <style:text-properties fo:color="#c9211e" loext:opacity="100%" fo:language="en" fo:country="US" officeooo:rsid="02c8c2b3" fo:background-color="transparent" loext:char-shading-value="0"/>
    </style:style>
    <style:style style:name="T627" style:family="text">
      <style:text-properties fo:color="#ffffff" loext:opacity="100%" fo:language="en" fo:country="US" officeooo:rsid="02a639cb" fo:background-color="transparent" loext:char-shading-value="0"/>
    </style:style>
    <style:style style:name="T628" style:family="text">
      <style:text-properties fo:color="#000000" loext:opacity="100%" style:font-name="Arial" fo:font-size="12pt" fo:language="en" fo:country="US" officeooo:rsid="02a639cb" fo:background-color="#ffff00" loext:char-shading-value="0" style:font-size-asian="10.5pt" style:font-size-complex="12pt"/>
    </style:style>
    <style:style style:name="T629" style:family="text">
      <style:text-properties fo:color="#000000" loext:opacity="100%" style:font-name="Arial" fo:font-size="12pt" fo:language="en" fo:country="US" officeooo:rsid="02c43c6d" fo:background-color="#ffff00" loext:char-shading-value="0" style:font-size-asian="10.5pt" style:font-size-complex="12pt"/>
    </style:style>
    <style:style style:name="T630" style:family="text">
      <style:text-properties fo:language="en" fo:country="US" officeooo:rsid="02c2a000" fo:background-color="transparent" loext:char-shading-value="0"/>
    </style:style>
    <style:style style:name="T631" style:family="text">
      <style:text-properties fo:color="#ffffff" loext:opacity="100%" fo:language="en" fo:country="US" officeooo:rsid="02a68055" fo:background-color="transparent" loext:char-shading-value="0"/>
    </style:style>
    <style:style style:name="T632" style:family="text">
      <style:text-properties fo:color="#ffffff" loext:opacity="100%" style:font-name="Arial" fo:font-size="12pt" fo:language="en" fo:country="US" officeooo:rsid="02a68055" fo:background-color="transparent" loext:char-shading-value="0" style:font-size-asian="12pt" style:font-size-complex="12pt"/>
    </style:style>
    <style:style style:name="T633" style:family="text">
      <style:text-properties fo:language="en" fo:country="US" officeooo:rsid="02a68055" fo:background-color="transparent" loext:char-shading-value="0"/>
    </style:style>
    <style:style style:name="T634" style:family="text">
      <style:text-properties fo:language="en" fo:country="US" officeooo:rsid="02c43c6d" fo:background-color="transparent" loext:char-shading-value="0"/>
    </style:style>
    <style:style style:name="T635" style:family="text">
      <style:text-properties fo:color="#ffffff" loext:opacity="100%" fo:language="en" fo:country="US" officeooo:rsid="02a77b72" fo:background-color="transparent" loext:char-shading-value="0"/>
    </style:style>
    <style:style style:name="T636" style:family="text">
      <style:text-properties fo:color="#ffffff" loext:opacity="100%" style:font-name="Arial" fo:font-size="12pt" fo:language="en" fo:country="US" officeooo:rsid="02a77b72" fo:background-color="transparent" loext:char-shading-value="0" style:font-size-asian="12pt" style:font-size-complex="12pt"/>
    </style:style>
    <style:style style:name="T637" style:family="text">
      <style:text-properties fo:language="en" fo:country="US" officeooo:rsid="02a77b72" fo:background-color="transparent" loext:char-shading-value="0"/>
    </style:style>
    <style:style style:name="T638" style:family="text">
      <style:text-properties fo:language="en" fo:country="US" officeooo:rsid="02a91f10" fo:background-color="transparent" loext:char-shading-value="0"/>
    </style:style>
    <style:style style:name="T639" style:family="text">
      <style:text-properties fo:color="#469df9" loext:opacity="100%" style:font-name="Arial" fo:font-size="10pt" fo:language="en" fo:country="US" officeooo:rsid="02a91f10" fo:background-color="transparent" loext:char-shading-value="0" style:font-size-asian="10pt" style:font-size-complex="10pt"/>
    </style:style>
    <style:style style:name="T640" style:family="text">
      <style:text-properties fo:color="#ffffff" loext:opacity="100%" fo:language="en" fo:country="US" officeooo:rsid="02a96161" fo:background-color="transparent" loext:char-shading-value="0"/>
    </style:style>
    <style:style style:name="T641" style:family="text">
      <style:text-properties fo:color="#ffffff" loext:opacity="100%" style:font-name="Arial" fo:font-size="12pt" fo:language="en" fo:country="US" officeooo:rsid="02a96161" fo:background-color="transparent" loext:char-shading-value="0" style:font-size-asian="12pt" style:font-size-complex="12pt"/>
    </style:style>
    <style:style style:name="T642" style:family="text">
      <style:text-properties fo:color="#ffffff" loext:opacity="100%" fo:language="en" fo:country="US" officeooo:rsid="02c67715" fo:background-color="transparent" loext:char-shading-value="0"/>
    </style:style>
    <style:style style:name="T643" style:family="text">
      <style:text-properties fo:color="#ffffff" loext:opacity="100%" fo:language="en" fo:country="US" officeooo:rsid="02aa2071" fo:background-color="transparent" loext:char-shading-value="0"/>
    </style:style>
    <style:style style:name="T644" style:family="text">
      <style:text-properties fo:language="en" fo:country="US" officeooo:rsid="02aa2071" fo:background-color="transparent" loext:char-shading-value="0"/>
    </style:style>
    <style:style style:name="T645" style:family="text">
      <style:text-properties fo:language="en" fo:country="US" officeooo:rsid="02aea96c" fo:background-color="transparent" loext:char-shading-value="0"/>
    </style:style>
    <style:style style:name="T646" style:family="text">
      <style:text-properties fo:color="#ffffff" loext:opacity="100%" style:font-name="Arial" fo:font-size="12pt" fo:language="en" fo:country="US" officeooo:rsid="02aa2071" fo:background-color="transparent" loext:char-shading-value="0" style:font-size-asian="12pt" style:font-size-complex="12pt"/>
    </style:style>
    <style:style style:name="T647" style:family="text">
      <style:text-properties fo:color="#ffffff" loext:opacity="100%" fo:language="en" fo:country="US" officeooo:rsid="02ac8803" fo:background-color="transparent" loext:char-shading-value="0"/>
    </style:style>
    <style:style style:name="T648" style:family="text">
      <style:text-properties fo:color="#ffffff" loext:opacity="100%" fo:language="en" fo:country="US" officeooo:rsid="02aea96c" fo:background-color="transparent" loext:char-shading-value="0"/>
    </style:style>
    <style:style style:name="T649" style:family="text">
      <style:text-properties fo:color="#ffffff" loext:opacity="100%" style:font-name="Arial" fo:font-size="12pt" fo:language="en" fo:country="US" officeooo:rsid="02ac8803" fo:background-color="transparent" loext:char-shading-value="0" style:font-size-asian="12pt" style:font-size-complex="12pt"/>
    </style:style>
    <style:style style:name="T650" style:family="text">
      <style:text-properties fo:language="en" fo:country="US" officeooo:rsid="02ab4df4" fo:background-color="transparent" loext:char-shading-value="0"/>
    </style:style>
    <style:style style:name="T651" style:family="text">
      <style:text-properties fo:color="#ffffff" loext:opacity="100%" fo:language="en" fo:country="US" officeooo:rsid="02ab4df4" fo:background-color="transparent" loext:char-shading-value="0"/>
    </style:style>
    <style:style style:name="T652" style:family="text">
      <style:text-properties fo:language="en" fo:country="US" officeooo:rsid="02ad8444" fo:background-color="transparent" loext:char-shading-value="0"/>
    </style:style>
    <style:style style:name="T653" style:family="text">
      <style:text-properties fo:color="#ffffff" loext:opacity="100%" fo:language="en" fo:country="US" officeooo:rsid="02ad8444" fo:background-color="transparent" loext:char-shading-value="0"/>
    </style:style>
    <style:style style:name="T654" style:family="text">
      <style:text-properties fo:color="#ffffff" loext:opacity="100%" fo:language="en" fo:country="US" officeooo:rsid="02cbdc43" fo:background-color="transparent" loext:char-shading-value="0"/>
    </style:style>
    <style:style style:name="T655" style:family="text">
      <style:text-properties fo:language="en" fo:country="US" officeooo:rsid="02cbdc43" fo:background-color="transparent" loext:char-shading-value="0"/>
    </style:style>
    <style:style style:name="T656" style:family="text">
      <style:text-properties fo:color="#ffffff" loext:opacity="100%" style:font-name="Arial" fo:font-size="12pt" fo:language="en" fo:country="US" officeooo:rsid="02cbdc43" fo:background-color="transparent" loext:char-shading-value="0" style:font-size-asian="12pt" style:font-size-complex="12pt"/>
    </style:style>
    <style:style style:name="T657" style:family="text">
      <style:text-properties fo:color="#ffffff" loext:opacity="100%" style:font-name="Arial" fo:font-size="12pt" fo:language="en" fo:country="US" officeooo:rsid="02ad8444" fo:background-color="transparent" loext:char-shading-value="0" style:font-size-asian="12pt" style:font-size-complex="12pt"/>
    </style:style>
    <style:style style:name="T658" style:family="text">
      <style:text-properties fo:language="en" fo:country="US" officeooo:rsid="02af3dee" fo:background-color="transparent" loext:char-shading-value="0"/>
    </style:style>
    <style:style style:name="T659" style:family="text">
      <style:text-properties fo:color="#ffffff" loext:opacity="100%" fo:language="en" fo:country="US" officeooo:rsid="02af3dee" fo:background-color="transparent" loext:char-shading-value="0"/>
    </style:style>
    <style:style style:name="T660" style:family="text">
      <style:text-properties fo:color="#ffffff" loext:opacity="100%" style:font-name="Arial" fo:font-size="12pt" fo:language="en" fo:country="US" officeooo:rsid="02af3dee" fo:background-color="transparent" loext:char-shading-value="0" style:font-size-asian="12pt" style:font-size-complex="12pt"/>
    </style:style>
    <style:style style:name="T661" style:family="text">
      <style:text-properties fo:language="en" fo:country="US" officeooo:rsid="02b7665d" fo:background-color="transparent" loext:char-shading-value="0"/>
    </style:style>
    <style:style style:name="T662" style:family="text">
      <style:text-properties fo:color="#ffffff" loext:opacity="100%" fo:language="en" fo:country="US" officeooo:rsid="02b7665d" fo:background-color="transparent" loext:char-shading-value="0"/>
    </style:style>
    <style:style style:name="T663" style:family="text">
      <style:text-properties fo:language="en" fo:country="US" officeooo:rsid="02c74098" fo:background-color="transparent" loext:char-shading-value="0"/>
    </style:style>
    <style:style style:name="T664" style:family="text">
      <style:text-properties fo:color="#ffffff" loext:opacity="100%" fo:language="en" fo:country="US" officeooo:rsid="02c74098" fo:background-color="transparent" loext:char-shading-value="0"/>
    </style:style>
    <style:style style:name="T665" style:family="text">
      <style:text-properties fo:color="#ffffff" loext:opacity="100%" style:font-name="Arial" fo:font-size="12pt" fo:language="en" fo:country="US" officeooo:rsid="02c74098" fo:background-color="transparent" loext:char-shading-value="0" style:font-size-asian="12pt" style:font-size-complex="12pt"/>
    </style:style>
    <style:style style:name="T666" style:family="text">
      <style:text-properties fo:color="#ffffff" loext:opacity="100%" fo:language="en" fo:country="US" officeooo:rsid="02c43c6d" fo:background-color="transparent" loext:char-shading-value="0"/>
    </style:style>
    <style:style style:name="T667" style:family="text">
      <style:text-properties fo:color="#ffffff" loext:opacity="100%" style:font-name="Arial" fo:font-size="12pt" fo:language="en" fo:country="US" officeooo:rsid="02c43c6d" fo:background-color="transparent" loext:char-shading-value="0" style:font-size-asian="12pt" style:font-size-complex="12pt"/>
    </style:style>
    <style:style style:name="T668" style:family="text">
      <style:text-properties fo:color="#ffffff" loext:opacity="100%" fo:language="en" fo:country="US" officeooo:rsid="02c6909b" fo:background-color="transparent" loext:char-shading-value="0"/>
    </style:style>
    <style:style style:name="T669" style:family="text">
      <style:text-properties fo:color="#ffffff" loext:opacity="100%" style:font-name="Arial" fo:font-size="12pt" fo:language="en" fo:country="US" officeooo:rsid="02c6909b" fo:background-color="transparent" loext:char-shading-value="0" style:font-size-asian="12pt" style:font-size-complex="12pt"/>
    </style:style>
    <style:style style:name="T670" style:family="text">
      <style:text-properties fo:color="#ffffff" loext:opacity="100%" fo:language="en" fo:country="US" officeooo:rsid="02c6ae5f" fo:background-color="transparent" loext:char-shading-value="0"/>
    </style:style>
    <style:style style:name="T671" style:family="text">
      <style:text-properties fo:color="#ffffff" loext:opacity="100%" style:font-name="Arial" fo:font-size="12pt" fo:language="en" fo:country="US" officeooo:rsid="02c6ae5f" fo:background-color="transparent" loext:char-shading-value="0" style:font-size-asian="12pt" style:font-size-complex="12pt"/>
    </style:style>
    <style:style style:name="T672" style:family="text">
      <style:text-properties fo:language="en" fo:country="US" officeooo:rsid="02c6ae5f" fo:background-color="transparent" loext:char-shading-value="0"/>
    </style:style>
    <style:style style:name="T673" style:family="text">
      <style:text-properties fo:color="#000000" loext:opacity="100%" style:font-name="Arial" fo:font-size="12pt" fo:language="en" fo:country="US" officeooo:rsid="02cbdc43" fo:background-color="#ffff00" loext:char-shading-value="0" style:font-size-asian="10.5pt" style:font-size-complex="12pt"/>
    </style:style>
    <style:style style:name="T674" style:family="text">
      <style:text-properties fo:color="#ffffff" loext:opacity="100%" fo:language="en" fo:country="US" officeooo:rsid="02cdc08e" fo:background-color="transparent" loext:char-shading-value="0"/>
    </style:style>
    <style:style style:name="T675" style:family="text">
      <style:text-properties fo:color="#ffffff" loext:opacity="100%" style:font-name="Arial" fo:font-size="12pt" fo:language="en" fo:country="US" officeooo:rsid="02cdc08e" fo:background-color="transparent" loext:char-shading-value="0" style:font-size-asian="12pt" style:font-size-complex="12pt"/>
    </style:style>
    <style:style style:name="T676" style:family="text">
      <style:text-properties fo:language="en" fo:country="US" officeooo:rsid="02cdc08e" fo:background-color="transparent" loext:char-shading-value="0"/>
    </style:style>
    <style:style style:name="T677" style:family="text">
      <style:text-properties fo:color="#000000" loext:opacity="100%" style:font-name="Arial" fo:font-size="12pt" fo:language="en" fo:country="US" officeooo:rsid="02d328f0" fo:background-color="#ffff00" loext:char-shading-value="0" style:font-size-asian="10.5pt" style:font-size-complex="12pt"/>
    </style:style>
    <style:style style:name="T678" style:family="text">
      <style:text-properties fo:language="en" fo:country="US" officeooo:rsid="02d328f0" fo:background-color="transparent" loext:char-shading-value="0"/>
    </style:style>
    <style:style style:name="T679" style:family="text">
      <style:text-properties fo:color="#ffffff" loext:opacity="100%" style:font-name="Arial" fo:font-size="12pt" fo:language="en" fo:country="US" officeooo:rsid="02cdd64b" fo:background-color="transparent" loext:char-shading-value="0" style:font-size-asian="12pt" style:font-size-complex="12pt"/>
    </style:style>
    <style:style style:name="T680" style:family="text">
      <style:text-properties fo:color="#ffffff" loext:opacity="100%" style:font-name="Arial" fo:font-size="12pt" fo:language="en" fo:country="US" officeooo:rsid="02d328f0" fo:background-color="transparent" loext:char-shading-value="0" style:font-size-asian="12pt" style:font-size-complex="12pt"/>
    </style:style>
    <style:style style:name="T681" style:family="text">
      <style:text-properties fo:color="#ffffff" loext:opacity="100%" style:font-name="Arial" fo:font-size="12pt" fo:language="en" fo:country="US" officeooo:rsid="02d3561b" fo:background-color="transparent" loext:char-shading-value="0" style:font-size-asian="12pt" style:font-size-complex="12pt"/>
    </style:style>
    <style:style style:name="T682" style:family="text">
      <style:text-properties fo:color="#ffffff" loext:opacity="100%" fo:language="en" fo:country="US" officeooo:rsid="02d3561b" fo:background-color="transparent" loext:char-shading-value="0"/>
    </style:style>
    <style:style style:name="T683" style:family="text">
      <style:text-properties fo:color="#ffffff" loext:opacity="100%" style:font-name="Arial" fo:font-size="12pt" fo:language="en" fo:country="US" officeooo:rsid="02d55e0f" fo:background-color="transparent" loext:char-shading-value="0" style:font-size-asian="12pt" style:font-size-complex="12pt"/>
    </style:style>
    <style:style style:name="T684" style:family="text">
      <style:text-properties fo:language="en" fo:country="US" officeooo:rsid="02d4a78b" fo:background-color="transparent" loext:char-shading-value="0"/>
    </style:style>
    <style:style style:name="T685" style:family="text">
      <style:text-properties fo:color="#ffffff" loext:opacity="100%" fo:language="en" fo:country="US" officeooo:rsid="02d4a78b" fo:background-color="transparent" loext:char-shading-value="0"/>
    </style:style>
    <style:style style:name="T686" style:family="text">
      <style:text-properties fo:color="#000000" loext:opacity="100%" style:font-name="Arial" fo:font-size="12pt" fo:language="en" fo:country="US" officeooo:rsid="02cdd64b" fo:background-color="#ffff00" loext:char-shading-value="0" style:font-size-asian="10.5pt" style:font-size-complex="12pt"/>
    </style:style>
    <style:style style:name="T687" style:family="text">
      <style:text-properties fo:language="en" fo:country="US" officeooo:rsid="02cdd64b" fo:background-color="transparent" loext:char-shading-value="0"/>
    </style:style>
    <style:style style:name="T688" style:family="text">
      <style:text-properties fo:color="#ffffff" loext:opacity="100%" style:font-name="Arial" fo:font-size="12pt" fo:language="en" fo:country="US" officeooo:rsid="02ce5da0" fo:background-color="transparent" loext:char-shading-value="0" style:font-size-asian="12pt" style:font-size-complex="12pt"/>
    </style:style>
    <style:style style:name="T689" style:family="text">
      <style:text-properties fo:color="#ffffff" loext:opacity="100%" style:font-name="Arial" fo:font-size="12pt" fo:language="en" fo:country="US" officeooo:rsid="02d1ba00" fo:background-color="transparent" loext:char-shading-value="0" style:font-size-asian="12pt" style:font-size-complex="12pt"/>
    </style:style>
    <style:style style:name="T690" style:family="text">
      <style:text-properties fo:language="en" fo:country="US" officeooo:rsid="02d1ba00" fo:background-color="transparent" loext:char-shading-value="0"/>
    </style:style>
    <style:style style:name="T691" style:family="text">
      <style:text-properties fo:color="#469df9" loext:opacity="100%" style:font-name="Arial" fo:font-size="10pt" fo:language="en" fo:country="US" officeooo:rsid="02d1ba00" fo:background-color="transparent" loext:char-shading-value="0" style:font-size-asian="10pt" style:font-size-complex="10pt"/>
    </style:style>
    <style:style style:name="T692" style:family="text">
      <style:text-properties fo:language="en" fo:country="US" officeooo:rsid="02ce5da0" fo:background-color="transparent" loext:char-shading-value="0"/>
    </style:style>
    <style:style style:name="T693" style:family="text">
      <style:text-properties fo:color="#ffffff" loext:opacity="100%" fo:language="en" fo:country="US" officeooo:rsid="02ce5da0" fo:background-color="transparent" loext:char-shading-value="0"/>
    </style:style>
    <style:style style:name="T694" style:family="text">
      <style:text-properties fo:color="#ffffff" loext:opacity="100%" fo:language="en" fo:country="US" officeooo:rsid="02cf4d7a" fo:background-color="transparent" loext:char-shading-value="0"/>
    </style:style>
    <style:style style:name="T695" style:family="text">
      <style:text-properties fo:color="#ffffff" loext:opacity="100%" style:font-name="Arial" fo:font-size="12pt" fo:language="en" fo:country="US" officeooo:rsid="02cf4d7a" fo:background-color="transparent" loext:char-shading-value="0" style:font-size-asian="12pt" style:font-size-complex="12pt"/>
    </style:style>
    <style:style style:name="T696" style:family="text">
      <style:text-properties fo:color="#ffffff" loext:opacity="100%" style:font-name="Arial" fo:font-size="12pt" fo:language="en" fo:country="US" officeooo:rsid="02d068ca" fo:background-color="transparent" loext:char-shading-value="0" style:font-size-asian="12pt" style:font-size-complex="12pt"/>
    </style:style>
    <style:style style:name="T697" style:family="text">
      <style:text-properties fo:color="#000000" loext:opacity="100%" style:font-name="Arial" fo:font-size="12pt" fo:language="en" fo:country="US" officeooo:rsid="02d6c6f9" fo:background-color="#ffff00" loext:char-shading-value="0" style:font-size-asian="10.5pt" style:font-size-complex="12pt"/>
    </style:style>
    <style:style style:name="T698" style:family="text">
      <style:text-properties fo:language="en" fo:country="US" officeooo:rsid="02d6c6f9" fo:background-color="transparent" loext:char-shading-value="0"/>
    </style:style>
    <style:style style:name="T699" style:family="text">
      <style:text-properties fo:color="#ffffff" loext:opacity="100%" style:font-name="Arial" fo:font-size="12pt" fo:language="en" fo:country="US" officeooo:rsid="02d6c6f9" fo:background-color="transparent" loext:char-shading-value="0" style:font-size-asian="12pt" style:font-size-complex="12pt"/>
    </style:style>
    <style:style style:name="T700" style:family="text">
      <style:text-properties fo:color="#ffffff" loext:opacity="100%" style:font-name="Arial" fo:font-size="12pt" fo:language="en" fo:country="US" officeooo:rsid="02d8606f" fo:background-color="transparent" loext:char-shading-value="0" style:font-size-asian="12pt" style:font-size-complex="12pt"/>
    </style:style>
    <style:style style:name="T701" style:family="text">
      <style:text-properties fo:color="#ffffff" loext:opacity="100%" fo:language="en" fo:country="US" officeooo:rsid="02da5741" fo:background-color="transparent" loext:char-shading-value="0"/>
    </style:style>
    <style:style style:name="T702" style:family="text">
      <style:text-properties fo:color="#ffffff" loext:opacity="100%" style:font-name="Arial" fo:font-size="12pt" fo:language="en" fo:country="US" officeooo:rsid="02da5741" fo:background-color="transparent" loext:char-shading-value="0" style:font-size-asian="12pt" style:font-size-complex="12pt"/>
    </style:style>
    <style:style style:name="T703" style:family="text">
      <style:text-properties fo:language="en" fo:country="US" officeooo:rsid="02da5741" fo:background-color="transparent" loext:char-shading-value="0"/>
    </style:style>
    <style:style style:name="T704" style:family="text">
      <style:text-properties fo:color="#000000" loext:opacity="100%" style:font-name="Arial" fo:font-size="12pt" fo:language="en" fo:country="US" officeooo:rsid="02af7935" fo:background-color="#ffff00" loext:char-shading-value="0" style:font-size-asian="10.5pt" style:font-size-complex="12pt"/>
    </style:style>
    <style:style style:name="T705" style:family="text">
      <style:text-properties fo:color="#000000" loext:opacity="100%" style:font-name="Arial" fo:font-size="12pt" fo:language="en" fo:country="US" officeooo:rsid="02b6f665" fo:background-color="#ffff00" loext:char-shading-value="0" style:font-size-asian="10.5pt" style:font-size-complex="12pt"/>
    </style:style>
    <style:style style:name="T706" style:family="text">
      <style:text-properties fo:language="en" fo:country="US" officeooo:rsid="02af7935" fo:background-color="transparent" loext:char-shading-value="0"/>
    </style:style>
    <style:style style:name="T707" style:family="text">
      <style:text-properties fo:color="#ffffff" loext:opacity="100%" fo:language="en" fo:country="US" officeooo:rsid="02af7935" fo:background-color="transparent" loext:char-shading-value="0"/>
    </style:style>
    <style:style style:name="T708" style:family="text">
      <style:text-properties fo:color="#ffffff" loext:opacity="100%" style:font-name="Arial" fo:font-size="12pt" fo:language="en" fo:country="US" officeooo:rsid="02af7935" fo:background-color="transparent" loext:char-shading-value="0" style:font-size-asian="12pt" style:font-size-complex="12pt"/>
    </style:style>
    <style:style style:name="T709" style:family="text">
      <style:text-properties fo:color="#ffffff" loext:opacity="100%" style:font-name="Arial" fo:font-size="12pt" fo:language="en" fo:country="US" officeooo:rsid="02b3160c" fo:background-color="transparent" loext:char-shading-value="0" style:font-size-asian="12pt" style:font-size-complex="12pt"/>
    </style:style>
    <style:style style:name="T710" style:family="text">
      <style:text-properties fo:color="#ffffff" loext:opacity="100%" fo:language="en" fo:country="US" officeooo:rsid="02b0fec7" fo:background-color="transparent" loext:char-shading-value="0"/>
    </style:style>
    <style:style style:name="T711" style:family="text">
      <style:text-properties fo:language="en" fo:country="US" officeooo:rsid="02b29cfe" fo:background-color="transparent" loext:char-shading-value="0"/>
    </style:style>
    <style:style style:name="T712" style:family="text">
      <style:text-properties fo:color="#ffffff" loext:opacity="100%" fo:language="en" fo:country="US" officeooo:rsid="02b3160c" fo:background-color="transparent" loext:char-shading-value="0"/>
    </style:style>
    <style:style style:name="T713" style:family="text">
      <style:text-properties fo:color="#ffffff" loext:opacity="100%" fo:language="en" fo:country="US" officeooo:rsid="02b6c8cc" fo:background-color="transparent" loext:char-shading-value="0"/>
    </style:style>
    <style:style style:name="T714" style:family="text">
      <style:text-properties fo:language="en" fo:country="US" officeooo:rsid="02b3160c" fo:background-color="transparent" loext:char-shading-value="0"/>
    </style:style>
    <style:style style:name="T715" style:family="text">
      <style:text-properties fo:color="#ffffff" loext:opacity="100%" fo:language="en" fo:country="US" officeooo:rsid="02b4f507" fo:background-color="transparent" loext:char-shading-value="0"/>
    </style:style>
    <style:style style:name="T716" style:family="text">
      <style:text-properties fo:color="#ffffff" loext:opacity="100%" fo:language="en" fo:country="US" officeooo:rsid="02b51a6d" fo:background-color="transparent" loext:char-shading-value="0"/>
    </style:style>
    <style:style style:name="T717" style:family="text">
      <style:text-properties fo:color="#ffffff" loext:opacity="100%" fo:language="en" fo:country="US" officeooo:rsid="02b69755" fo:background-color="transparent" loext:char-shading-value="0"/>
    </style:style>
    <style:style style:name="T718" style:family="text">
      <style:text-properties fo:color="#000000" loext:opacity="100%" style:font-name="Arial" fo:font-size="12pt" fo:language="en" fo:country="US" officeooo:rsid="02b7c8cb" fo:background-color="#ffff00" loext:char-shading-value="0" style:font-size-asian="10.5pt" style:font-size-complex="12pt"/>
    </style:style>
    <style:style style:name="T719" style:family="text">
      <style:text-properties fo:color="#ffffff" loext:opacity="100%" fo:language="en" fo:country="US" officeooo:rsid="02b7c8cb" fo:background-color="transparent" loext:char-shading-value="0"/>
    </style:style>
    <style:style style:name="T720" style:family="text">
      <style:text-properties fo:color="#ffffff" loext:opacity="100%" style:font-name="Arial" fo:font-size="12pt" fo:language="en" fo:country="US" officeooo:rsid="02b7c8cb" fo:background-color="transparent" loext:char-shading-value="0" style:font-size-asian="12pt" style:font-size-complex="12pt"/>
    </style:style>
    <style:style style:name="T721" style:family="text">
      <style:text-properties fo:language="en" fo:country="US" officeooo:rsid="02b9ba75" fo:background-color="transparent" loext:char-shading-value="0"/>
    </style:style>
    <style:style style:name="T722" style:family="text">
      <style:text-properties fo:color="#ffffff" loext:opacity="100%" fo:language="en" fo:country="US" officeooo:rsid="02baae4e" fo:background-color="transparent" loext:char-shading-value="0"/>
    </style:style>
    <style:style style:name="T723" style:family="text">
      <style:text-properties fo:language="en" fo:country="US" officeooo:rsid="02bbffd1" fo:background-color="transparent" loext:char-shading-value="0"/>
    </style:style>
    <style:style style:name="T724" style:family="text">
      <style:text-properties fo:language="en" fo:country="US" officeooo:rsid="02bc6828" fo:background-color="transparent" loext:char-shading-value="0"/>
    </style:style>
    <style:style style:name="T725" style:family="text">
      <style:text-properties fo:color="#000000" loext:opacity="100%" style:font-name="Arial" fo:font-size="12pt" fo:language="en" fo:country="US" officeooo:rsid="02bee2f2" fo:background-color="#ffff00" loext:char-shading-value="0" style:font-size-asian="10.5pt" style:font-size-complex="12pt"/>
    </style:style>
    <style:style style:name="T726" style:family="text">
      <style:text-properties fo:color="#000000" loext:opacity="100%" style:font-name="Arial" fo:font-size="12pt" fo:language="en" fo:country="US" officeooo:rsid="02bd895f" fo:background-color="#ffff00" loext:char-shading-value="0" style:font-size-asian="10.5pt" style:font-size-complex="12pt"/>
    </style:style>
    <style:style style:name="T727" style:family="text">
      <style:text-properties fo:color="#ffffff" loext:opacity="100%" fo:language="en" fo:country="US" officeooo:rsid="02bee2f2" fo:background-color="transparent" loext:char-shading-value="0"/>
    </style:style>
    <style:style style:name="T728" style:family="text">
      <style:text-properties fo:color="#ffffff" loext:opacity="100%" style:font-name="Arial" fo:font-size="12pt" fo:language="en" fo:country="US" officeooo:rsid="02bee2f2" fo:background-color="transparent" loext:char-shading-value="0" style:font-size-asian="12pt" style:font-size-complex="12pt"/>
    </style:style>
    <style:style style:name="T729" style:family="text">
      <style:text-properties fo:language="en" fo:country="US" officeooo:rsid="02bee65f" fo:background-color="transparent" loext:char-shading-value="0"/>
    </style:style>
    <style:style style:name="T730" style:family="text">
      <style:text-properties fo:color="#ffffff" loext:opacity="100%" fo:language="en" fo:country="US" officeooo:rsid="02bee65f" fo:background-color="transparent" loext:char-shading-value="0"/>
    </style:style>
    <style:style style:name="T731" style:family="text">
      <style:text-properties fo:color="#ffffff" loext:opacity="100%" style:font-name="Arial" fo:font-size="12pt" fo:language="en" fo:country="US" officeooo:rsid="02bee65f" fo:background-color="transparent" loext:char-shading-value="0" style:font-size-asian="12pt" style:font-size-complex="12pt"/>
    </style:style>
    <style:style style:name="T732" style:family="text">
      <style:text-properties fo:color="#ffffff" loext:opacity="100%" fo:language="en" fo:country="US" officeooo:rsid="02c0dc05" fo:background-color="transparent" loext:char-shading-value="0"/>
    </style:style>
    <style:style style:name="T733" style:family="text">
      <style:text-properties fo:color="#ffffff" loext:opacity="100%" style:font-name="Arial" fo:font-size="12pt" fo:language="en" fo:country="US" officeooo:rsid="02c0dc05" fo:background-color="transparent" loext:char-shading-value="0" style:font-size-asian="12pt" style:font-size-complex="12pt"/>
    </style:style>
    <style:style style:name="T734" style:family="text">
      <style:text-properties fo:color="#ffffff" loext:opacity="100%" fo:language="en" fo:country="US" officeooo:rsid="02bd895f" fo:background-color="transparent" loext:char-shading-value="0"/>
    </style:style>
    <style:style style:name="T735" style:family="text">
      <style:text-properties fo:color="#ffffff" loext:opacity="100%" style:font-name="Arial" fo:font-size="12pt" fo:language="en" fo:country="US" officeooo:rsid="02bd895f" fo:background-color="transparent" loext:char-shading-value="0" style:font-size-asian="12pt" style:font-size-complex="12pt"/>
    </style:style>
    <style:style style:name="T736" style:family="text">
      <style:text-properties fo:language="en" fo:country="US" officeooo:rsid="02bd895f" fo:background-color="transparent" loext:char-shading-value="0"/>
    </style:style>
    <style:style style:name="T737" style:family="text">
      <style:text-properties fo:color="#ffffff" loext:opacity="100%" fo:language="en" fo:country="US" officeooo:rsid="02bd949a" fo:background-color="transparent" loext:char-shading-value="0"/>
    </style:style>
    <style:style style:name="T738" style:family="text">
      <style:text-properties fo:color="#ffffff" loext:opacity="100%" style:font-name="Arial" fo:font-size="12pt" fo:language="en" fo:country="US" officeooo:rsid="02bd949a" fo:background-color="transparent" loext:char-shading-value="0" style:font-size-asian="12pt" style:font-size-complex="12pt"/>
    </style:style>
    <style:style style:name="T739" style:family="text">
      <style:text-properties fo:language="en" fo:country="US" officeooo:rsid="02bd949a" fo:background-color="transparent" loext:char-shading-value="0"/>
    </style:style>
    <style:style style:name="T740" style:family="text">
      <style:text-properties fo:color="#ffffff" loext:opacity="100%" fo:language="en" fo:country="US" officeooo:rsid="02be9cd8" fo:background-color="transparent" loext:char-shading-value="0"/>
    </style:style>
    <style:style style:name="T741" style:family="text">
      <style:text-properties fo:color="#000000" loext:opacity="100%" style:font-name="Arial" fo:font-size="12pt" fo:language="en" fo:country="US" officeooo:rsid="02dc523b" fo:background-color="#ff4000" loext:char-shading-value="0" style:font-size-asian="10.5pt" style:font-size-complex="12pt"/>
    </style:style>
    <style:style style:name="T742" style:family="text">
      <style:text-properties fo:color="#ffffff" loext:opacity="100%" fo:language="en" fo:country="US" officeooo:rsid="02dc523b" fo:background-color="transparent" loext:char-shading-value="0"/>
    </style:style>
    <style:style style:name="T743" style:family="text">
      <style:text-properties fo:language="en" fo:country="US" officeooo:rsid="02ddcacd"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h text:style-name="P567" text:outline-level="3"><text:soft-page-break/><text:span text:style-name="_3c_C_3e_"><text:span text:style-name="T563">CASTING</text:span></text:span></text:h>
      <text:p text:style-name="P568"><text:span text:style-name="_3c_C_3e_"><text:span text:style-name="T564">C type casting. Implicito y explicito</text:span></text:span></text:p>
      <text:p text:style-name="P568"><text:span text:style-name="_3c_C_3e_"><text:span text:style-name="T565">En C++ se puede hacer un C-type casting de tal manera que podemos hacer un casteo implícito:<text:line-break/></text:span></text:span><text:span text:style-name="_3c_C_3e_"><text:span text:style-name="T566">double num1 = 5.2;</text:span></text:span></text:p>
      <text:p text:style-name="P568"><text:span text:style-name="_3c_C_3e_"><text:span text:style-name="T566">int num2 = num1; </text:span></text:span><text:span text:style-name="_2f__2f_C"><text:span text:style-name="T566">//casting implicito ya que combierte en tiempo de compilacion a int el num1</text:span></text:span></text:p>
      <text:p text:style-name="P568"><text:span text:style-name="_3c_C_3e_"><text:span text:style-name="T565">O explicito:</text:span></text:span></text:p>
      <text:p text:style-name="P568"><text:span text:style-name="_3c_C_3e_"><text:span text:style-name="T566">double num1 = 5.2;</text:span></text:span></text:p>
      <text:p text:style-name="P568"><text:span text:style-name="_3c_C_3e_"><text:span text:style-name="T566">num1 = (int)(num1 + 3.1); </text:span></text:span><text:span text:style-name="_2f__2f_C"><text:span text:style-name="T566">//será 8 en vez de 8.3</text:span></text:span></text:p>
      <text:p text:style-name="P568"><text:span text:style-name="_2f__2f_C"><text:span text:style-name="T566"/></text:span></text:p>
      <text:p text:style-name="P568"><text:span text:style-name="_3c_C_3e_"><text:span text:style-name="T564">Static Casting</text:span></text:span></text:p>
      <text:p text:style-name="P568"><text:span text:style-name="_3c_C_3e_"><text:span text:style-name="T56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568"><text:span text:style-name="_3c_C_3e_"><text:span text:style-name="T566">double num1 = 5.2;</text:span></text:span></text:p>
      <text:p text:style-name="P568"><text:span text:style-name="_3c_C_3e_"><text:span text:style-name="T566">num1 = </text:span></text:span><text:span text:style-name="_3c_C_2b__2b__3e_"><text:span text:style-name="T352">stating_cast&lt;int&gt;(</text:span></text:span><text:span text:style-name="_3c_C_3e_"><text:span text:style-name="T566">num1 + 3.1</text:span></text:span><text:span text:style-name="_3c_C_2b__2b__3e_"><text:span text:style-name="T352">)</text:span></text:span><text:span text:style-name="_3c_C_3e_"><text:span text:style-name="T566">; </text:span></text:span><text:span text:style-name="_2f__2f_C"><text:span text:style-name="T566">//será 8</text:span></text:span></text:p>
      <text:p text:style-name="P568"><text:span text:style-name="_3c_C_3e_"><text:span text:style-name="T565">y como el c-type casting, este casteo será procesado en tiempos de compilación.</text:span></text:span></text:p>
      <text:p text:style-name="P568"><text:span text:style-name="_3c_C_3e_"><text:span text:style-name="T565"/></text:span></text:p>
      <text:p text:style-name="P568"><text:span text:style-name="_3c_C_3e_"><text:span text:style-name="T564">Dynamic</text:span></text:span><text:span text:style-name="_3c_C_3e_"><text:span text:style-name="T567">_cast</text:span></text:span></text:p>
      <text:p text:style-name="P568"><text:span text:style-name="_3c_C_3e_"><text:span text:style-name="T565">Dynamic Casting se produce en tiempo de ejecución, por lo que es más “pesado” y peor rendimiento que static_casting, pero nos ofrece una seguridad extra. Se usa en objetos polimórficos:</text:span></text:span></text:p>
      <text:p text:style-name="P569"><text:span text:style-name="_3c_C_3e_"><text:span text:style-name="T568">class Entidad{</text:span></text:span></text:p>
      <text:p text:style-name="P569"><text:span text:style-name="_3c_C_3e_"><text:span text:style-name="T568">public:</text:span></text:span></text:p>
      <text:p text:style-name="P569"><text:span text:style-name="_3c_C_3e_"><text:span text:style-name="T568"><text:tab/>virtual void Funcion();</text:span></text:span></text:p>
      <text:p text:style-name="P569"><text:span text:style-name="_3c_C_3e_"><text:span text:style-name="T568">};</text:span></text:span></text:p>
      <text:p text:style-name="P569"><text:span text:style-name="_3c_C_3e_"><text:span text:style-name="T568">class Jugador{</text:span></text:span></text:p>
      <text:p text:style-name="P569"><text:span text:style-name="_3c_C_3e_"><text:span text:style-name="T568">};</text:span></text:span></text:p>
      <text:p text:style-name="P569"><text:span text:style-name="_3c_C_3e_"><text:span text:style-name="T568">class Enemigo{</text:span></text:span></text:p>
      <text:p text:style-name="P569"><text:span text:style-name="_3c_C_3e_"><text:span text:style-name="T568">};</text:span></text:span></text:p>
      <text:p text:style-name="P569"><text:span text:style-name="_3c_C_3e_"><text:span text:style-name="T568">int main(void){</text:span></text:span></text:p>
      <text:p text:style-name="P569"><text:span text:style-name="_3c_C_3e_"><text:span text:style-name="T568"><text:tab/>Jugador *jugador1 = new Jugador();</text:span></text:span></text:p>
      <text:p text:style-name="P569"><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1</text:span></text:span><text:span text:style-name="_3c_C_3e_"><text:span text:style-name="T568"> = (Entidad*)jugador1; </text:span></text:span><text:span text:style-name="_2f__2f_C"><text:span text:style-name="T568">//</text:span></text:span><text:span text:style-name="_2f__2f_C"><text:span text:style-name="T569">sin problema compilacion.</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stat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direccion memoria que entidad1</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dynam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memoria que entidad1</text:span></text:span></text:p>
      <text:p text:style-name="P569"><text:span text:style-name="_3c_C_3e_"><text:span text:style-name="T568">}</text:span></text:span></text:p>
      <text:p text:style-name="P570"><text:soft-page-break/><text:span text:style-name="_3c_C_3e_"><text:span text:style-name="T570">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68">int main(void){</text:span></text:span></text:p>
      <text:p text:style-name="P570"><text:span text:style-name="_3c_C_3e_"><text:span text:style-name="T568"><text:tab/>Jugador *jugador1 = new Jugador();</text:span></text:span></text:p>
      <text:p text:style-name="P570"><text:span text:style-name="_3c_C_3e_"><text:span text:style-name="T568"><text:tab/></text:span></text:span><text:span text:style-name="_3c_C_3e_"><text:span text:style-name="T569">Enemigo</text:span></text:span><text:span text:style-name="_3c_C_3e_"><text:span text:style-name="T568"> *</text:span></text:span><text:span text:style-name="_3c_C_3e_"><text:span text:style-name="T569">enemigo1</text:span></text:span><text:span text:style-name="_3c_C_3e_"><text:span text:style-name="T568"> = (E</text:span></text:span><text:span text:style-name="_3c_C_3e_"><text:span text:style-name="T569">nemigo</text:span></text:span><text:span text:style-name="_3c_C_3e_"><text:span text:style-name="T568">*)jugador1; </text:span></text:span><text:span text:style-name="_2f__2f_C"><text:span text:style-name="T569">//Compila, pero INDETERMINADO</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text:span></text:span><text:span text:style-name="_3c_C_3e_"><text:span text:style-name="T568">n</text:span></text:span><text:span text:style-name="_3c_C_3e_"><text:span text:style-name="T569">emigo2</text:span></text:span><text:span text:style-name="_3c_C_3e_"><text:span text:style-name="T568"> = </text:span></text:span><text:span text:style-name="_3c_C_3e_"><text:span text:style-name="T569">static_cast&lt;Enemigo*&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Error. Conversion inválida </text:span></text:span><text:span text:style-name="_2f__2f_C"><text:span text:style-name="T571">más seguro que ctype casting!!</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nemigo3 </text:span></text:span><text:span text:style-name="_3c_C_3e_"><text:span text:style-name="T568">= </text:span></text:span><text:span text:style-name="_3c_C_2b__2b__3e_"><text:span text:style-name="T352">dynamic_cast&lt;Enemigo*&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será nulptr</text:span></text:span></text:p>
      <text:p text:style-name="P570"><text:span text:style-name="_3c_C_3e_"><text:span text:style-name="T568">}</text:span></text:span></text:p>
      <text:p text:style-name="P571"><text:span text:style-name="_3c_C_3e_"><text:span text:style-name="T572">Aquí está el problema. Un Enemigo es una Entidad, y un Jugador es una Entidad. PERO un Jugador no es un Enemigo y viceversa. Por lo tanto:<text:line-break/></text:span></text:span></text:p>
      <text:p text:style-name="P571"><text:span text:style-name="_3c_C_3e_"><text:span text:style-name="T572">1. enemigo1 compilará por que en tiempo de compilación no se sabe lo que es, pero al ejecutar, hará cosas indefinidas. jugador1 NO es un Enemigo y si queremos acceder a una función del Enemigo, no podrá.</text:span></text:span></text:p>
      <text:p text:style-name="P571"><text:span text:style-name="_3c_C_3e_"><text:span text:style-name="T572"/></text:span></text:p>
      <text:p text:style-name="P571"><text:span text:style-name="_3c_C_3e_"><text:span text:style-name="T572">2. enemigo2 no dejará compilar por que ya de por si reconoce que los dos tipos no coinciden asi que protege, mientras el caso 1 que era un ctype casting dejaba compilar.</text:span></text:span></text:p>
      <text:p text:style-name="P571"><text:span text:style-name="_3c_C_3e_"><text:span text:style-name="T572"/></text:span></text:p>
      <text:p text:style-name="P571"><text:span text:style-name="_3c_C_3e_"><text:span text:style-name="T572">3. ememigo3 compilará, pero nos dará que el puntero es NULL, por que no puede sacar la información. Lo hará en tiempo de ejecución y por eso tarda más, pero si luego en nuestro main, ponemos algo como:</text:span></text:span></text:p>
      <text:p text:style-name="P571"><text:span text:style-name="_3c_C_3e_"><text:span text:style-name="T573">if (enemigo3) bla bla bla</text:span></text:span></text:p>
      <text:p text:style-name="P571"><text:span text:style-name="_3c_C_3e_"><text:span text:style-name="T572">Estaremos protegidos y no habrá segfault. De tal forma que preguntando podriamos ver si enemigo3 es un enemigo o no. En este caso no, sería un jugador y por eso da NULL.</text:span></text:span></text:p>
      <text:p text:style-name="P571"><text:span text:style-name="_3c_C_3e_"><text:span text:style-name="T572"/></text:span></text:p>
      <text:p text:style-name="P572"><text:span text:style-name="_3c_C_3e_"><text:span text:style-name="T574">Si hicieramos:<text:line-break/></text:span></text:span><text:span text:style-name="_3c_C_3e_"><text:span text:style-name="T352">Jugador </text:span></text:span><text:span text:style-name="_3c_C_3e_"><text:span text:style-name="T568">*</text:span></text:span><text:span text:style-name="_3c_C_3e_"><text:span text:style-name="T569">enemigo</text:span></text:span><text:span text:style-name="_3c_C_3e_"><text:span text:style-name="T575">4</text:span></text:span><text:span text:style-name="_3c_C_3e_"><text:span text:style-name="T569"> </text:span></text:span><text:span text:style-name="_3c_C_3e_"><text:span text:style-name="T568">= </text:span></text:span><text:span text:style-name="_3c_C_2b__2b__3e_"><text:span text:style-name="T352">dynamic_cast&lt;</text:span></text:span><text:span text:style-name="_3c_C_2b__2b__3e_"><text:span text:style-name="T575">Jugador</text:span></text:span><text:span text:style-name="_3c_C_2b__2b__3e_"><text:span text:style-name="T352">*&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p>
      <text:p text:style-name="P572"><text:span text:style-name="_3c_C_3e_"><text:span text:style-name="T574">Sí que tendría una dirección válida enemigo4 ya que enemigo4 sí que sería un jugador.</text:span></text:span></text:p>
      <text:p text:style-name="P572"><text:span text:style-name="_3c_C_3e_"><text:span text:style-name="T574"/></text:span></text:p>
      <text:p text:style-name="P573"><text:span text:style-name="_3c_C_3e_"><text:span text:style-name="T567">Reinterpret_c</text:span></text:span><text:span text:style-name="_3c_C_3e_"><text:span text:style-name="T564">ast</text:span></text:span></text:p>
      <text:p text:style-name="P573"><text:span text:style-name="_3c_C_3e_"><text:span text:style-name="T574">S</text:span></text:span><text:span text:style-name="_3c_C_3e_"><text:span text:style-name="T576">ería el homologo al ctype cast, de tal manera que “deja” hacer lo que el programador quiera, pero que luego puede dar muchos problemas, o sea que es muy peligroso.</text:span></text:span></text:p>
      <text:p text:style-name="P574"><text:span text:style-name="_3c_C_3e_"><text:span text:style-name="T577">reinterpret_cast, solo permite hacer casteo a PUNTEROS o REFERENCIAS. Por que lo que trata de hacer es asignar la direccion de variable y cambiarla</text:span></text:span></text:p>
      <text:p text:style-name="P574"><text:span text:style-name="_3c_C_3e_"><text:span text:style-name="T578">float pi = 3.14f;</text:span></text:span></text:p>
      <text:p text:style-name="P574"><text:span text:style-name="_3c_C_3e_"><text:span text:style-name="T578">std::cout &lt;&lt; (int)pi; </text:span></text:span><text:span text:style-name="_2f__2f_C"><text:span text:style-name="T352">//funciona y seria 3.</text:span></text:span></text:p>
      <text:p text:style-name="P574"><text:span text:style-name="_3c_C_3e_"><text:span text:style-name="T578">std::cout &lt;&lt; *reinterpret_cast&lt;int*&gt;(&amp;pi); </text:span></text:span><text:span text:style-name="_2f__2f_C"><text:span text:style-name="T578">//funciona pero daría un valor erroneo ya que tranfiere la dirección de memoria float a int, es decir interpreta como un int, lo que era un float. </text:span></text:span><text:span text:style-name="_2f__2f_C"><text:span text:style-name="T579">Lo dereferenciamos.</text:span></text:span></text:p>
      <text:p text:style-name="P574"><text:soft-page-break/><text:span text:style-name="_3c_C_3e_"><text:span text:style-name="T578">std::cout &lt;&lt; reinterpret_cast&lt;int&gt;(pi); </text:span></text:span><text:span text:style-name="_2f__2f_C"><text:span text:style-name="T578">//no compilaria. Son tipos diferentes.</text:span></text:span></text:p>
      <text:p text:style-name="P575"><text:span text:style-name="_3c_C_3e_"><text:span text:style-name="T580">En este siguiente caso las tres sería la misma dirección de memoria, pero si dereferenciamos veremos que el valor es diferente, por que se interpreta uno como int, y el otro como float, aunque sea la misma dirección de memoria.</text:span></text:span></text:p>
      <text:p text:style-name="P575"><text:span text:style-name="_3c_C_3e_"><text:span text:style-name="T352">std::cout &lt;&lt; &amp;(pi);</text:span></text:span></text:p>
      <text:p text:style-name="P575"><text:span text:style-name="_3c_C_3e_"><text:span text:style-name="T352">std::cout &lt;&lt; reinterpret_cast&lt;int*&gt;(&amp;pi);</text:span></text:span><text:span text:style-name="_2f__2f_C"><text:span text:style-name="T579"> //no dereferenciado. Imprime la direccion de memoria.</text:span></text:span></text:p>
      <text:p text:style-name="P575"><text:span text:style-name="_3c_C_3e_"><text:span text:style-name="T352">std::cout &lt;&lt; reinterpret_cast&lt;float*&gt;(&amp;pi); </text:span></text:span></text:p>
      <text:p text:style-name="P575"><text:span text:style-name="_2f__2f_C"><text:span text:style-name="T579"/></text:span></text:p>
      <text:p text:style-name="P576"><text:span text:style-name="_3c_C_3e_"><text:span text:style-name="T581">Entonces, donde se usaría, siendo tan peligroso? Imaginemos un juego con datos de jugador:<text:line-break/></text:span></text:span><text:span text:style-name="_3c_C_3e_"><text:span text:style-name="T352">struct GameState{</text:span></text:span></text:p>
      <text:p text:style-name="P576"><text:span text:style-name="_3c_C_3e_"><text:span text:style-name="T352"><text:tab/>int<text:tab/><text:tab/>level;</text:span></text:span></text:p>
      <text:p text:style-name="P576"><text:span text:style-name="_3c_C_3e_"><text:span text:style-name="T352"><text:tab/>int<text:tab/><text:tab/>health;</text:span></text:span></text:p>
      <text:p text:style-name="P576"><text:span text:style-name="_3c_C_3e_"><text:span text:style-name="T352"><text:tab/>int<text:tab/><text:tab/>points;</text:span></text:span></text:p>
      <text:p text:style-name="P576"><text:span text:style-name="_3c_C_3e_"><text:span text:style-name="T352"><text:tab/>bool<text:tab/>GameCompleted;</text:span></text:span></text:p>
      <text:p text:style-name="P576"><text:span text:style-name="_3c_C_3e_"><text:span text:style-name="T352"><text:tab/>bool<text:tab/>BossDefeated;</text:span></text:span></text:p>
      <text:p text:style-name="P576"><text:span text:style-name="_3c_C_3e_"><text:span text:style-name="T352">};</text:span></text:span></text:p>
      <text:p text:style-name="P576"><text:span text:style-name="_3c_C_3e_"><text:span text:style-name="T582">int main(){</text:span></text:span></text:p>
      <text:p text:style-name="P576"><text:span text:style-name="_3c_C_3e_"><text:span text:style-name="T582"><text:tab/>GameState gs = {66, 100, 999, false, false};</text:span></text:span></text:p>
      <text:p text:style-name="P576"><text:span text:style-name="_3c_C_3e_"><text:span text:style-name="T582"><text:tab/>char kk[</text:span></text:span><text:span text:style-name="_3c_C_3e_"><text:span text:style-name="T583">sizeof</text:span></text:span><text:span text:style-name="_3c_C_3e_"><text:span text:style-name="T582">(GameState)]; </text:span></text:span><text:span text:style-name="_2f__2f_C"><text:span text:style-name="T582">//memoria </text:span></text:span><text:span text:style-name="_2f__2f_C"><text:span text:style-name="T583">en el stack del mismo tamaño de GameState. 14bytes.</text:span></text:span></text:p>
      <text:p text:style-name="P576"><text:span text:style-name="_3c_C_3e_"><text:span text:style-name="T582"><text:tab/>std::memcpy(kk, &amp;gs, sizeof(GameState)); </text:span></text:span><text:span text:style-name="_2f__2f_C"><text:span text:style-name="T582">//</text:span></text:span><text:span text:style-name="_2f__2f_C"><text:span text:style-name="T583">copia los bytes de gs al array kk</text:span></text:span><text:span text:style-name="_3c_C_3e_"><text:span text:style-name="T583">.</text:span></text:span></text:p>
      <text:p text:style-name="P576"><text:span text:style-name="_3c_C_3e_"><text:span text:style-name="T582"><text:tab/>std::cout &lt;&lt; *(kk) &lt;&lt; std::endl; </text:span></text:span><text:span text:style-name="_2f__2f_C"><text:span text:style-name="T582">//imprime la letra B, por que B en ASCII es 66.</text:span></text:span></text:p>
      <text:p text:style-name="P576"><text:span text:style-name="_3c_C_3e_"><text:span text:style-name="T582"><text:tab/>std::cout &lt;&lt; *((int*)kk) &lt;&lt; std::endl;</text:span></text:span><text:span text:style-name="_2f__2f_C"><text:span text:style-name="T582"> //imprime 66</text:span></text:span></text:p>
      <text:p text:style-name="P576"><text:span text:style-name="_3c_C_3e_"><text:span text:style-name="T582"/></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 &lt;&lt; std::endl; </text:span></text:span><text:span text:style-name="_2f__2f_C"><text:span text:style-name="T582">//imprime 66</text:span></text:span><text:span text:style-name="_3c_C_3e_"><text:span text:style-name="T582"><text:line-break/><text:tab/>std::cout &lt;&lt; </text:span></text:span><text:span text:style-name="_3c_C_2b__2b__3e_"><text:span text:style-name="T352">*reinterpret_cast</text:span></text:span><text:span text:style-name="_3c_C_3e_"><text:span text:style-name="T582">&lt;int*&gt;(kk+4) &lt;&lt; …; </text:span></text:span><text:span text:style-name="_2f__2f_C"><text:span text:style-name="T582">//imprime 100. +4k suma 4bytes a inicio d kk</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8) &lt;&lt;…;</text:span></text:span><text:span text:style-name="_2f__2f_C"><text:span text:style-name="T582"> //imprime 999</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2</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7"><text:span text:style-name="_3c_C_3e_"><text:span text:style-name="T583"><text:tab/></text:span></text:span><text:span text:style-name="_3c_C_3e_"><text:span text:style-name="T582">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3</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6"><text:span text:style-name="_3c_C_3e_"><text:span text:style-name="T582">}</text:span></text:span></text:p>
      <text:p text:style-name="P577"><text:span text:style-name="_3c_C_3e_"><text:span text:style-name="T584">Las lineas de reinterpret_cast, no funcionarian con static_cast, ni con dynamic_cast. Si que lo haría si fueran (int*)(kk+4) etc… pero es peligroso.</text:span></text:span></text:p>
      <text:p text:style-name="P577"><text:span text:style-name="_3c_C_3e_"><text:span text:style-name="T584">El otro “sitio” donde utilizar reinterpret_cast </text:span></text:span><text:span text:style-name="_3c_C_3e_"><text:span text:style-name="T585">es con un void puntero:</text:span></text:span></text:p>
      <text:p text:style-name="P578"><text:span text:style-name="_3c_C_3e_"><text:span text:style-name="T352">void *p = &amp;gs; </text:span></text:span><text:span text:style-name="_2f__2f_C"><text:span text:style-name="T352">//puntero generico, </text:span></text:span><text:span text:style-name="_2f__2f_C"><text:span text:style-name="T586">sobre ese gs que venia de la estructura GameState.</text:span></text:span></text:p>
      <text:p text:style-name="P578"><text:span text:style-name="_3c_C_3e_"><text:span text:style-name="T352">GameState *real = reinterpret_cast&lt;GameState*&gt;(p); </text:span></text:span><text:span text:style-name="_2f__2f_C"><text:span text:style-name="T352">//reinterpretación</text:span></text:span></text:p>
      <text:p text:style-name="P578"><text:span text:style-name="_2f__2f_C"><text:span text:style-name="T352"/></text:span></text:p>
      <text:p text:style-name="P578"><text:span text:style-name="_2f__2f_C"><text:span text:style-name="T352"/></text:span></text:p>
      <text:p text:style-name="P579"><text:soft-page-break/><text:span text:style-name="_3c_C_3e_"><text:span text:style-name="T587">Const</text:span></text:span><text:span text:style-name="_3c_C_3e_"><text:span text:style-name="T567">_c</text:span></text:span><text:span text:style-name="_3c_C_3e_"><text:span text:style-name="T564">ast</text:span></text:span></text:p>
      <text:p text:style-name="P579"><text:span text:style-name="_3c_C_3e_"><text:span text:style-name="T584">L</text:span></text:span><text:span text:style-name="_3c_C_3e_"><text:span text:style-name="T588">o que hace es saltarse “a la torera” la etiqueta const, puesta sobre un objeto para poder modificarlo. Tienen que ser siempre punteros o referencias.:</text:span></text:span></text:p>
      <text:p text:style-name="P579"><text:span text:style-name="_3c_C_3e_"><text:span text:style-name="T589">class Demo{</text:span></text:span></text:p>
      <text:p text:style-name="P579"><text:span text:style-name="_3c_C_3e_"><text:span text:style-name="T589">public:</text:span></text:span></text:p>
      <text:p text:style-name="P579"><text:span text:style-name="_3c_C_3e_"><text:span text:style-name="T589"><text:tab/>int var = 1;</text:span></text:span></text:p>
      <text:p text:style-name="P579"><text:span text:style-name="_3c_C_3e_"><text:span text:style-name="T589"><text:tab/>void func() const{ </text:span></text:span><text:span text:style-name="_2f__2f_C"><text:span text:style-name="T589">//const no permite modificar el objeto</text:span></text:span></text:p>
      <text:p text:style-name="P579"><text:span text:style-name="_3c_C_3e_"><text:span text:style-name="T589"><text:tab/><text:tab/>var = 2; //error de compilación. No se puede alterar.</text:span></text:span></text:p>
      <text:p text:style-name="P579"><text:span text:style-name="_3c_C_3e_"><text:span text:style-name="T589"><text:tab/><text:tab/></text:span></text:span><text:span text:style-name="_3c_C_2b__2b__3e_"><text:span text:style-name="T352">(const_cast&lt;Demo*&gt;(this))</text:span></text:span><text:span text:style-name="_3c_C_3e_"><text:span text:style-name="T589">→var = 2; //lo pasará. Tiene narices!! XDD</text:span></text:span></text:p>
      <text:p text:style-name="P579"><text:span text:style-name="_3c_C_3e_"><text:span text:style-name="T589"><text:tab/>}</text:span></text:span></text:p>
      <text:p text:style-name="P579"><text:span text:style-name="_3c_C_3e_"><text:span text:style-name="T589">};</text:span></text:span></text:p>
      <text:p text:style-name="P579"><text:span text:style-name="_3c_C_3e_"><text:span text:style-name="T588">O:</text:span></text:span></text:p>
      <text:p text:style-name="P579"><text:span text:style-name="_3c_C_3e_"><text:span text:style-name="T352">const Tipo* ptr = …;</text:span></text:span></text:p>
      <text:p text:style-name="P579"><text:span text:style-name="_3c_C_3e_"><text:span text:style-name="T352">Tipo* mod = c</text:span></text:span><text:span text:style-name="_3c_C_2b__2b__3e_"><text:span text:style-name="T352">onst_cast&lt;Tipo*&gt;(ptr)</text:span></text:span><text:span text:style-name="_3c_C_3e_"><text:span text:style-name="T352">; </text:span></text:span><text:span text:style-name="_2f__2f_C"><text:span text:style-name="T352">//quita el const.</text:span></text:span></text:p>
      <text:p text:style-name="P579"><text:span text:style-name="_3c_C_3e_"><text:span text:style-name="T588">O referencias:</text:span></text:span></text:p>
      <text:p text:style-name="P579"><text:span text:style-name="_3c_C_3e_"><text:span text:style-name="T352">const Tipo&amp; r = …;</text:span></text:span></text:p>
      <text:p text:style-name="P579"><text:span text:style-name="_3c_C_3e_"><text:span text:style-name="T352">Tipo&amp; mod = </text:span></text:span><text:span text:style-name="_3c_C_2b__2b__3e_"><text:span text:style-name="T352">const_cast&lt;Tipo&amp;&gt;(r)</text:span></text:span><text:span text:style-name="_3c_C_3e_"><text:span text:style-name="T352">; </text:span></text:span><text:span text:style-name="_2f__2f_C"><text:span text:style-name="T352">//quita el const.</text:span></text:span></text:p>
      <text:p text:style-name="P579"><text:span text:style-name="_2f__2f_C"><text:span text:style-name="T352"/></text:span></text:p>
      <text:p text:style-name="P579"><text:span text:style-name="_2f__2f_C"><text:span text:style-name="T352"/></text:span></text:p>
      <text:p text:style-name="P579"><text:span text:style-name="_2f__2f_C"><text:span text:style-name="T352"/></text:span></text:p>
      <text:h text:style-name="P580" text:outline-level="3"><text:span text:style-name="_3c_C_3e_"><text:span text:style-name="T590">FUNCIONES TEMPLATE</text:span></text:span></text:h>
      <text:p text:style-name="P581"><text:span text:style-name="_3c_C_3e_"><text:span text:style-name="T591"/></text:span></text:p>
      <text:p text:style-name="P582"><text:span text:style-name="_3c_C_3e_"><text:span text:style-name="T592">Cuando tenemos funciones Overload, como esto:<text:line-break/><text:line-break/></text:span></text:span><text:span text:style-name="_3c_C_3e_"><text:span text:style-name="T352">int<text:tab/><text:tab/>f_max(int a, int b){</text:span></text:span></text:p>
      <text:p text:style-name="P582"><text:span text:style-name="_3c_C_3e_"><text:span text:style-name="T352"><text:tab/>return (a &gt; b) ? a : b;}</text:span></text:span></text:p>
      <text:p text:style-name="P582"><text:span text:style-name="_3c_C_3e_"><text:span text:style-name="T352">double<text:tab/>f_max(double a, double b){</text:span></text:span></text:p>
      <text:p text:style-name="P582"><text:span text:style-name="_3c_C_3e_"><text:span text:style-name="T352"><text:tab/>return (a &gt; b) ? a : b;}</text:span></text:span></text:p>
      <text:p text:style-name="P582"><text:span text:style-name="_3c_C_3e_"><text:span text:style-name="T592"/></text:span></text:p>
      <text:p text:style-name="P582"><text:span text:style-name="_3c_C_3e_"><text:span text:style-name="T592">Si tenemos repetici</text:span></text:span><text:span text:style-name="_3c_C_3e_"><text:span text:style-name="T593">ó</text:span></text:span><text:span text:style-name="_3c_C_3e_"><text:span text:style-name="T592">n de l</text:span></text:span><text:span text:style-name="_3c_C_3e_"><text:span text:style-name="T593">ó</text:span></text:span><text:span text:style-name="_3c_C_3e_"><text:span text:style-name="T592">gica tendremos que repetir mucho. Aqu</text:span></text:span><text:span text:style-name="_3c_C_3e_"><text:span text:style-name="T593">í</text:span></text:span><text:span text:style-name="_3c_C_3e_"><text:span text:style-name="T592"> es donde entran los TEMPLATES (plantillas) de funciones:</text:span></text:span></text:p>
      <text:p text:style-name="P582"><text:span text:style-name="_3c_C_2b__2b__3e_"><text:span text:style-name="T352"/></text:span></text:p>
      <text:p text:style-name="P582"><text:span text:style-name="_3c_C_2b__2b__3e_"><text:span text:style-name="T352">template &lt;typename T&gt; T f_max(T a, T b)</text:span></text:span><text:span text:style-name="_3c_C_3e_"><text:span text:style-name="T352">{</text:span></text:span></text:p>
      <text:p text:style-name="P582"><text:span text:style-name="_3c_C_3e_"><text:span text:style-name="T352"><text:tab/>return (a &gt; b) ? a : b;}</text:span></text:span></text:p>
      <text:p text:style-name="P582"><text:span text:style-name="_3c_C_3e_"><text:span text:style-name="T592"/></text:span></text:p>
      <text:p text:style-name="P583"><text:soft-page-break/><text:span text:style-name="_3c_C_3e_"><text:span text:style-name="T594">Para definirlo tiene que estar toda la linea junta. template &lt;typename T&gt; no es como un include donde le digo que voy a usar tipos variables.</text:span></text:span><text:span text:style-name="_3c_C_3e_"><text:span text:style-name="T595"> Si tuvieramos varias funciones que queremos usar Template TENEMOS que ponerles su palabra template en ellos. Esto NO es v</text:span></text:span><text:span text:style-name="_3c_C_3e_"><text:span text:style-name="T596">á</text:span></text:span><text:span text:style-name="_3c_C_3e_"><text:span text:style-name="T595">lido:</text:span></text:span></text:p>
      <text:p text:style-name="P583"><text:span text:style-name="_3c_C_3e_"><text:span text:style-name="T595"/></text:span></text:p>
      <text:p text:style-name="P584"><text:span text:style-name="_3c_C_2b__2b__3e_"><text:span text:style-name="T597">template &lt;typename T&gt; T f_max(T a, T b)</text:span></text:span><text:span text:style-name="_3c_C_3e_"><text:span text:style-name="T597">{</text:span></text:span></text:p>
      <text:p text:style-name="P584"><text:span text:style-name="_3c_C_3e_"><text:span text:style-name="T597"><text:tab/>return (a &gt; b) ? a : b;}<text:line-break/></text:span></text:span><text:span text:style-name="_3c_C_3e_"><text:span text:style-name="T598">T f_min(T a, T b){ return (a &lt; b) ? a : b;}</text:span></text:span></text:p>
      <text:p text:style-name="P584"><text:span text:style-name="_3c_C_3e_"><text:span text:style-name="T598"/></text:span></text:p>
      <text:p text:style-name="P584"><text:span text:style-name="_3c_C_3e_"><text:span text:style-name="T595">Sino que ser</text:span></text:span><text:span text:style-name="_3c_C_3e_"><text:span text:style-name="T596">í</text:span></text:span><text:span text:style-name="_3c_C_3e_"><text:span text:style-name="T595">a as</text:span></text:span><text:span text:style-name="_3c_C_3e_"><text:span text:style-name="T596">í</text:span></text:span><text:span text:style-name="_3c_C_3e_"><text:span text:style-name="T595">:<text:line-break/></text:span></text:span></text:p>
      <text:p text:style-name="P584"><text:span text:style-name="_3c_C_2b__2b__3e_"><text:span text:style-name="T352">template &lt;typename T&gt; T f_max(T a, T b)</text:span></text:span><text:span text:style-name="_3c_C_3e_"><text:span text:style-name="T352">{</text:span></text:span></text:p>
      <text:p text:style-name="P584"><text:span text:style-name="_3c_C_3e_"><text:span text:style-name="T352"><text:tab/>return (a &gt; b) ? a : b;}</text:span></text:span></text:p>
      <text:p text:style-name="P584"><text:span text:style-name="_3c_C_2b__2b__3e_"><text:span text:style-name="T352">template &lt;typename T&gt; T f_</text:span></text:span><text:span text:style-name="_3c_C_2b__2b__3e_"><text:span text:style-name="T599">min</text:span></text:span><text:span text:style-name="_3c_C_2b__2b__3e_"><text:span text:style-name="T352">(T a, T b)</text:span></text:span><text:span text:style-name="_3c_C_3e_"><text:span text:style-name="T352">{</text:span></text:span></text:p>
      <text:p text:style-name="P584"><text:span text:style-name="_3c_C_3e_"><text:span text:style-name="T352"><text:tab/>return (a </text:span></text:span><text:span text:style-name="_3c_C_3e_"><text:span text:style-name="T599">&lt;</text:span></text:span><text:span text:style-name="_3c_C_3e_"><text:span text:style-name="T352"> b) ? a : b;}</text:span></text:span></text:p>
      <text:p text:style-name="P584"><text:span text:style-name="_3c_C_3e_"><text:span text:style-name="T352"/></text:span></text:p>
      <text:p text:style-name="P585"><text:span text:style-name="_3c_C_3e_"><text:span text:style-name="T600">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601"> d</text:span></text:span><text:span text:style-name="_3c_C_3e_"><text:span text:style-name="T602">á</text:span></text:span><text:span text:style-name="_3c_C_3e_"><text:span text:style-name="T601">ndole al play con el c</text:span></text:span><text:span text:style-name="_3c_C_3e_"><text:span text:style-name="T602">ód</text:span></text:span><text:span text:style-name="_3c_C_3e_"><text:span text:style-name="T601">igo copiado el generar</text:span></text:span><text:span text:style-name="_3c_C_3e_"><text:span text:style-name="T602">á</text:span></text:span><text:span text:style-name="_3c_C_3e_"><text:span text:style-name="T601"> las funciones en tiempo de compilaci</text:span></text:span><text:span text:style-name="_3c_C_3e_"><text:span text:style-name="T602">ón</text:span></text:span><text:span text:style-name="_3c_C_3e_"><text:span text:style-name="T601">.</text:span></text:span></text:p>
      <text:p text:style-name="P586"><text:span text:style-name="_3c_C_3e_"><text:span text:style-name="T601">En C++11, podriamos hacer luego:</text:span></text:span></text:p>
      <text:p text:style-name="P586"><text:span text:style-name="_3c_C_3e_"><text:span text:style-name="T601"/></text:span></text:p>
      <text:p text:style-name="P586"><text:span text:style-name="_3c_C_2b__2b__3e_"><text:span text:style-name="T352">auto</text:span></text:span><text:span text:style-name="_3c_C_3e_"><text:span text:style-name="T352"> variable = f_max(a, b); </text:span></text:span><text:span text:style-name="_2f__2f_C"><text:span text:style-name="T352">//auto NO C++98!!!!</text:span></text:span></text:p>
      <text:p text:style-name="P586"><text:span text:style-name="_2f__2f_C"><text:span text:style-name="T352"/></text:span></text:p>
      <text:p text:style-name="P587"><text:span text:style-name="_3c_C_3e_"><text:span text:style-name="T600">Para </text:span></text:span><text:span text:style-name="_3c_C_3e_"><text:span text:style-name="T603">que no de error en el compilador, el cuerpo de la funci</text:span></text:span><text:span text:style-name="_3c_C_3e_"><text:span text:style-name="T604">ón</text:span></text:span><text:span text:style-name="_3c_C_3e_"><text:span text:style-name="T603"> ha de poder hacer las operaciones que tenga con las variables que se les pase. De echo, una funci</text:span></text:span><text:span text:style-name="_3c_C_3e_"><text:span text:style-name="T604">ón</text:span></text:span><text:span text:style-name="_3c_C_3e_"><text:span text:style-name="T603"> multiplicaci</text:span></text:span><text:span text:style-name="_3c_C_3e_"><text:span text:style-name="T604">ón</text:span></text:span><text:span text:style-name="_3c_C_3e_"><text:span text:style-name="T603"> podria multiplicar enteros, doubles, floats, etc... pero no strings (que s</text:span></text:span><text:span text:style-name="_3c_C_3e_"><text:span text:style-name="T604">í</text:span></text:span><text:span text:style-name="_3c_C_3e_"><text:span text:style-name="T603"> que podr</text:span></text:span><text:span text:style-name="_3c_C_3e_"><text:span text:style-name="T604">í</text:span></text:span><text:span text:style-name="_3c_C_3e_"><text:span text:style-name="T603">an sumarse) asi que si hago un template multiplicando las variables, y luego paso un std::string, el compilador se quejar</text:span></text:span><text:span text:style-name="_3c_C_3e_"><text:span text:style-name="T604">í</text:span></text:span><text:span text:style-name="_3c_C_3e_"><text:span text:style-name="T603">a.</text:span></text:span></text:p>
      <text:p text:style-name="P587"><text:span text:style-name="_3c_C_3e_"><text:span text:style-name="T603"/></text:span></text:p>
      <text:p text:style-name="P588"><text:span text:style-name="_3c_C_2b__2b__3e_"><text:span text:style-name="T352">template &lt;typename T&gt; T </text:span></text:span><text:span text:style-name="_3c_C_2b__2b__3e_"><text:span text:style-name="T605">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text:span></text:span><text:span text:style-name="_3c_C_3e_"><text:span text:style-name="T606">*</text:span></text:span><text:span text:style-name="_3c_C_3e_"><text:span text:style-name="T605">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std::string a = "hola";</text:span></text:span></text:p>
      <text:p text:style-name="P588"><text:span text:style-name="_3c_C_3e_"><text:span text:style-name="T605"><text:tab/>std::string b = "mundo";</text:span></text:span></text:p>
      <text:p text:style-name="P588"><text:span text:style-name="_3c_C_3e_"><text:span text:style-name="T605"><text:tab/>multiply(a, b);</text:span></text:span></text:p>
      <text:p text:style-name="P588"><text:span text:style-name="_3c_C_3e_"><text:span text:style-name="T605">}</text:span></text:span></text:p>
      <text:p text:style-name="P588"><text:span text:style-name="_3c_C_3e_"><text:span text:style-name="T600"/></text:span></text:p>
      <text:p text:style-name="P588"><text:span text:style-name="_3c_C_3e_"><text:span text:style-name="T600">P</text:span></text:span><text:span text:style-name="_3c_C_3e_"><text:span text:style-name="T607">ero tambi</text:span></text:span><text:span text:style-name="_3c_C_3e_"><text:span text:style-name="T608">é</text:span></text:span><text:span text:style-name="_3c_C_3e_"><text:span text:style-name="T607">n el tipo debe ser el mismo, por que si no dar</text:span></text:span><text:span text:style-name="_3c_C_3e_"><text:span text:style-name="T608">á error de compilación:</text:span></text:span><text:span text:style-name="_3c_C_3e_"><text:span text:style-name="T607"> </text:span></text:span></text:p>
      <text:p text:style-name="P588"><text:span text:style-name="_3c_C_3e_"><text:span text:style-name="T607"/></text:span></text:p>
      <text:p text:style-name="P588"><text:soft-page-break/><text:span text:style-name="_3c_C_3e_"><text:span text:style-name="T607"/></text:span></text:p>
      <text:p text:style-name="P588"><text:span text:style-name="_3c_C_3e_"><text:span text:style-name="T607"/></text:span></text:p>
      <text:p text:style-name="P588"><text:span text:style-name="_3c_C_2b__2b__3e_"><text:span text:style-name="T352">template &lt;typename T&gt; T </text:span></text:span><text:span text:style-name="_3c_C_2b__2b__3e_"><text:span text:style-name="T606">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double a = 4.3;</text:span></text:span></text:p>
      <text:p text:style-name="P588"><text:span text:style-name="_3c_C_3e_"><text:span text:style-name="T605"><text:tab/></text:span></text:span><text:span text:style-name="_3c_C_3e_"><text:span text:style-name="T606">int </text:span></text:span><text:span text:style-name="_3c_C_3e_"><text:span text:style-name="T605">b = 3; </text:span></text:span><text:span text:style-name="_2f__2f_C"><text:span text:style-name="T605">//debe ser el mismo tipo</text:span></text:span></text:p>
      <text:p text:style-name="P588"><text:span text:style-name="_3c_C_3e_"><text:span text:style-name="T605"><text:tab/>multiply(a, b);} </text:span></text:span></text:p>
      <text:p text:style-name="P588"><text:span text:style-name="_3c_C_3e_"><text:span text:style-name="T605"/></text:span></text:p>
      <text:p text:style-name="P589"><text:span text:style-name="_3c_C_3e_"><text:span text:style-name="T609"/></text:span></text:p>
      <text:p text:style-name="P589"><text:span text:style-name="_3c_C_3e_"><text:span text:style-name="T609">P</text:span></text:span><text:span text:style-name="_3c_C_3e_"><text:span text:style-name="T610">ASAR POR REFERENCIA</text:span></text:span></text:p>
      <text:p text:style-name="P590"><text:span text:style-name="_3c_C_3e_"><text:span text:style-name="T611">Para cambiar los valores de unas variables dentro de una función que no devuelve nada </text:span></text:span><text:span text:style-name="_3c_C_3e_"><text:span text:style-name="T612">y que se reflejen fuera</text:span></text:span><text:span text:style-name="_3c_C_3e_"><text:span text:style-name="T611"> sería así:<text:line-break/></text:span></text:span></text:p>
      <text:p text:style-name="P591"><text:span text:style-name="_3c_C_3e_"><text:span text:style-name="T352">template &lt;typename T&gt;</text:span></text:span></text:p>
      <text:p text:style-name="P591"><text:span text:style-name="_3c_C_2b__2b__3e_"><text:span text:style-name="T352">void</text:span></text:span><text:span text:style-name="_3c_C_3e_"><text:span text:style-name="T352"> swap(T </text:span></text:span><text:span text:style-name="_3c_C_2b__2b__3e_"><text:span text:style-name="T352">&amp;</text:span></text:span><text:span text:style-name="_3c_C_3e_"><text:span text:style-name="T352">a, T </text:span></text:span><text:span text:style-name="_3c_C_2b__2b__3e_"><text:span text:style-name="T352">&amp;</text:span></text:span><text:span text:style-name="_3c_C_3e_"><text:span text:style-name="T352">b){</text:span></text:span></text:p>
      <text:p text:style-name="P590"><text:span text:style-name="_3c_C_3e_"><text:span text:style-name="T352"><text:tab/>T aux<text:tab/>= a;</text:span></text:span></text:p>
      <text:p text:style-name="P590"><text:span text:style-name="_3c_C_3e_"><text:span text:style-name="T352"><text:tab/>a<text:tab/><text:tab/><text:tab/>= b;</text:span></text:span></text:p>
      <text:p text:style-name="P590"><text:span text:style-name="_3c_C_3e_"><text:span text:style-name="T352"><text:tab/>b <text:tab/><text:tab/><text:tab/>= aux;}</text:span></text:span><text:span text:style-name="_3c_C_3e_"><text:span text:style-name="T611"><text:line-break/></text:span></text:span></text:p>
      <text:p text:style-name="P589"><text:span text:style-name="_3c_C_3e_"><text:span text:style-name="T609">V</text:span></text:span><text:span text:style-name="_3c_C_3e_"><text:span text:style-name="T610">ARIOS TIPOS DE VARIABLES EN EL MISMO TEMPLATE</text:span></text:span></text:p>
      <text:p text:style-name="P590"><text:span text:style-name="_3c_C_3e_"><text:span text:style-name="T611">Como hemos dicho, si pasamos dos tipos distintos a una que admite una sola </text:span></text:span><text:span text:style-name="_3c_C_2b__2b__3e_"><text:span text:style-name="T352">T</text:span></text:span><text:span text:style-name="_3c_C_3e_"><text:span text:style-name="T611">, el programa no compilaría, para hacerlo hay que hacer esto:</text:span></text:span></text:p>
      <text:p text:style-name="P590"><text:span text:style-name="_3c_C_3e_"><text:span text:style-name="T611"/></text:span></text:p>
      <text:p text:style-name="P590"><text:span text:style-name="_3c_C_3e_"><text:span text:style-name="T352">template &lt;</text:span></text:span><text:span text:style-name="_3c_C_2b__2b__3e_"><text:span text:style-name="T352">typename T, typename V, typename D</text:span></text:span><text:span text:style-name="_3c_C_3e_"><text:span text:style-name="T352">&gt; </text:span></text:span><text:span text:style-name="_3c_C_2b__2b__3e_"><text:span text:style-name="T352">D</text:span></text:span><text:span text:style-name="_3c_C_3e_"><text:span text:style-name="T352"> funcion(</text:span></text:span><text:span text:style-name="_3c_C_2b__2b__3e_"><text:span text:style-name="T352">T </text:span></text:span><text:span text:style-name="_3c_C_3e_"><text:span text:style-name="T352">a, </text:span></text:span><text:span text:style-name="_3c_C_2b__2b__3e_"><text:span text:style-name="T352">V</text:span></text:span><text:span text:style-name="_3c_C_3e_"><text:span text:style-name="T352"> b);</text:span></text:span></text:p>
      <text:p text:style-name="P590"><text:span text:style-name="_2f__2f_C"><text:span text:style-name="T352">//aquí D es el t</text:span></text:span><text:span text:style-name="_2f__2f_C"><text:span text:style-name="T613">i</text:span></text:span><text:span text:style-name="_2f__2f_C"><text:span text:style-name="T352">po de devolución de la función. Ya puede ser void, int, double, etc… </text:span></text:span><text:span text:style-name="_2f__2f_C"><text:span text:style-name="T614">Puede ser cualquier letra.</text:span></text:span></text:p>
      <text:p text:style-name="P590"><text:span text:style-name="_3c_C_3e_"><text:span text:style-name="T611"/></text:span></text:p>
      <text:p text:style-name="P589"><text:span text:style-name="_3c_C_3e_"><text:span text:style-name="T609">P</text:span></text:span><text:span text:style-name="_3c_C_3e_"><text:span text:style-name="T610">ASAR FUNCIONES COMO PARÁMETROS</text:span></text:span></text:p>
      <text:p text:style-name="P590"><text:span text:style-name="_3c_C_3e_"><text:span text:style-name="T611">Pero es que podemos pasar cualquier cosa:<text:line-break/></text:span></text:span></text:p>
      <text:p text:style-name="P590"><text:span text:style-name="_3c_C_3e_"><text:span text:style-name="T352">template &lt;typename T, typename F, typename K&gt; void funcion(T*, </text:span></text:span><text:span text:style-name="_3c_C_2b__2b__3e_"><text:span text:style-name="T352">F (*f)(K)</text:span></text:span><text:span text:style-name="_3c_C_3e_"><text:span text:style-name="T352">);</text:span></text:span></text:p>
      <text:p text:style-name="P590"><text:span text:style-name="_2f__2f_C"><text:span text:style-name="T614">//esto crearia una void funcion, que permitiría como parametros, un tipo puntero de cualquier tipo (podria ser una matriz, ya que apunta al primer elemento) y como segundo parametro una funcion (</text:span></text:span><text:span text:style-name="_2f__2f_C"><text:span text:style-name="T613">las funciones pasadas por parametro se convierten automaticamente a puntero. no necesitan &amp;funcion, aunque también eso se puede hacer</text:span></text:span><text:span text:style-name="_2f__2f_C"><text:span text:style-name="T614">) que devolviera el parámetro F y que tomara como parametro único </text:span></text:span><text:span text:style-name="_2f__2f_C"><text:span text:style-name="T613">de </text:span></text:span><text:span text:style-name="_2f__2f_C"><text:span text:style-name="T614">cualquie</text:span></text:span><text:span text:style-name="_2f__2f_C"><text:span text:style-name="T613">r</text:span></text:span><text:span text:style-name="_2f__2f_C"><text:span text:style-name="T614"> tipo K.</text:span></text:span></text:p>
      <text:p text:style-name="P590"><text:span text:style-name="_2f__2f_C"><text:span text:style-name="T614"/></text:span></text:p>
      <text:p text:style-name="P590"><text:span text:style-name="_2f__2f_C"><text:span text:style-name="T614"/></text:span></text:p>
      <text:p text:style-name="P591"><text:soft-page-break/><text:span text:style-name="_3c_C_3e_"><text:span text:style-name="T611">Pero </text:span></text:span><text:span text:style-name="_3c_C_3e_"><text:span text:style-name="T612">en el ejemplo anterior podemos ser mucho más genéricos:<text:line-break/></text:span></text:span></text:p>
      <text:p text:style-name="P591"><text:span text:style-name="_3c_C_3e_"><text:span text:style-name="T352">template &lt;typename T, typename F&gt; void funcion(T*, </text:span></text:span><text:span text:style-name="_3c_C_2b__2b__3e_"><text:span text:style-name="T352">F </text:span></text:span><text:span text:style-name="_3c_C_2b__2b__3e_"><text:span text:style-name="T613">f</text:span></text:span><text:span text:style-name="_3c_C_2b__2b__3e_"><text:span text:style-name="T352">)</text:span></text:span><text:span text:style-name="_3c_C_3e_"><text:span text:style-name="T352">); </text:span></text:span><text:span text:style-name="_2f__2f_C"><text:span text:style-name="T352">//</text:span></text:span><text:span text:style-name="_2f__2f_C"><text:span text:style-name="T613">quitamos K</text:span></text:span><text:span text:style-name="_3c_C_3e_"><text:span text:style-name="T352"><text:line-break/></text:span></text:span><text:span text:style-name="_2f__2f_C"><text:span text:style-name="T352">//</text:span></text:span><text:span text:style-name="_2f__2f_C"><text:span text:style-name="T613">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591"><text:span text:style-name="_2f__2f_C"><text:span text:style-name="T613"/></text:span></text:p>
      <text:p text:style-name="P592"><text:span text:style-name="_3c_C_3e_"><text:span text:style-name="T615">A</text:span></text:span><text:span text:style-name="_3c_C_3e_"><text:span text:style-name="T610">RGUMENTOS EXPLICITOS EN LLAMADAS A TEMPLATES</text:span></text:span></text:p>
      <text:p text:style-name="P593"><text:span text:style-name="_3c_C_3e_"><text:span text:style-name="T611">P</text:span></text:span><text:span text:style-name="_3c_C_3e_"><text:span text:style-name="T616">odemos pasarle un argumento explícito a la hora de llamar a la función. Se hace pasándo el tipo entre &lt; &gt;:</text:span></text:span></text:p>
      <text:p text:style-name="P593"><text:span text:style-name="_3c_C_3e_"><text:span text:style-name="T616"/></text:span></text:p>
      <text:p text:style-name="P593"><text:span text:style-name="_3c_C_3e_"><text:span text:style-name="T352">template &lt;typename T&gt; </text:span></text:span><text:span text:style-name="_3c_C_3e_"><text:span text:style-name="T617">T maximun(T a, T b){</text:span></text:span></text:p>
      <text:p text:style-name="P593"><text:span text:style-name="_3c_C_3e_"><text:span text:style-name="T617"><text:tab/>return (a &gt; b) ? a : b;}</text:span></text:span></text:p>
      <text:p text:style-name="P593"><text:span text:style-name="_3c_C_3e_"><text:span text:style-name="T617">int main(){</text:span></text:span></text:p>
      <text:p text:style-name="P593"><text:span text:style-name="_3c_C_3e_"><text:span text:style-name="T617"><text:tab/>int <text:tab/><text:tab/><text:tab/>var1 = 32;</text:span></text:span></text:p>
      <text:p text:style-name="P593"><text:span text:style-name="_3c_C_3e_"><text:span text:style-name="T617"><text:tab/>double <text:tab/><text:tab/>var2 = 42.4;</text:span></text:span></text:p>
      <text:p text:style-name="P593"><text:span text:style-name="_3c_C_3e_"><text:span text:style-name="T617"><text:tab/>std::string<text:tab/>var3 = “hola”;</text:span></text:span></text:p>
      <text:p text:style-name="P593"><text:span text:style-name="_3c_C_3e_"><text:span text:style-name="T617"><text:tab/>maximun(var1, var2); </text:span></text:span><text:span text:style-name="_2f__2f_C"><text:span text:style-name="T617">//daría error de compilación. Tendria que usar varios tipos en la misma función</text:span></text:span></text:p>
      <text:p text:style-name="P593"><text:span text:style-name="_3c_C_3e_"><text:span text:style-name="T617"><text:tab/>maximun</text:span></text:span><text:span text:style-name="_3c_C_2b__2b__3e_"><text:span text:style-name="T352">&lt;double&gt;</text:span></text:span><text:span text:style-name="_3c_C_3e_"><text:span text:style-name="T617">(var1, var2); </text:span></text:span><text:span text:style-name="_2f__2f_C"><text:span text:style-name="T617">//funciona. Haria conversión a double</text:span></text:span></text:p>
      <text:p text:style-name="P593"><text:span text:style-name="_3c_C_3e_"><text:span text:style-name="T617"><text:tab/>maximun</text:span></text:span><text:span text:style-name="_3c_C_2b__2b__3e_"><text:span text:style-name="T352">&lt;double&gt;</text:span></text:span><text:span text:style-name="_3c_C_3e_"><text:span text:style-name="T617">(var1, var3); </text:span></text:span><text:span text:style-name="_2f__2f_C"><text:span text:style-name="T617">//error de compilación. No se puede convertir string a double</text:span></text:span></text:p>
      <text:p text:style-name="P593"><text:span text:style-name="_3c_C_3e_"><text:span text:style-name="T617">}</text:span></text:span></text:p>
      <text:p text:style-name="P593"><text:span text:style-name="_3c_C_3e_"><text:span text:style-name="T617"/></text:span></text:p>
      <text:p text:style-name="P594"><text:span text:style-name="_3c_C_3e_"><text:span text:style-name="T618">T</text:span></text:span><text:span text:style-name="_3c_C_3e_"><text:span text:style-name="T610">EMPLATE SPECIALIZATION</text:span></text:span></text:p>
      <text:p text:style-name="P595"><text:span text:style-name="_3c_C_3e_"><text:span text:style-name="T619">Hay variables que no tiene sentido pasarle a un mismo template y que no darían el resultado que esperamos. Así si pasamos a este template maximun:</text:span></text:span></text:p>
      <text:p text:style-name="P595"><text:span text:style-name="_3c_C_3e_"><text:span text:style-name="T619"/></text:span></text:p>
      <text:p text:style-name="P595"><text:span text:style-name="_3c_C_3e_"><text:span text:style-name="T352">template &lt;typename T&gt; </text:span></text:span><text:span text:style-name="_3c_C_3e_"><text:span text:style-name="T617">T maximun(T</text:span></text:span><text:span text:style-name="_3c_C_3e_"><text:span text:style-name="T620">&amp;</text:span></text:span><text:span text:style-name="_3c_C_3e_"><text:span text:style-name="T617"> a, T</text:span></text:span><text:span text:style-name="_3c_C_3e_"><text:span text:style-name="T620">&amp;</text:span></text:span><text:span text:style-name="_3c_C_3e_"><text:span text:style-name="T617"> b){</text:span></text:span></text:p>
      <text:p text:style-name="P595"><text:span text:style-name="_3c_C_3e_"><text:span text:style-name="T617">return (a &gt; b) ? a : b;}</text:span></text:span></text:p>
      <text:p text:style-name="P595"><text:span text:style-name="_3c_C_3e_"><text:span text:style-name="T617">int main(){</text:span></text:span></text:p>
      <text:p text:style-name="P595"><text:span text:style-name="_3c_C_3e_"><text:span text:style-name="T617"><text:tab/></text:span></text:span><text:span text:style-name="_3c_C_3e_"><text:span text:style-name="T620">const char* var1 = “hola”;</text:span></text:span></text:p>
      <text:p text:style-name="P595"><text:span text:style-name="_3c_C_3e_"><text:span text:style-name="T620"><text:tab/>const char* var2 = “adios”;</text:span></text:span></text:p>
      <text:p text:style-name="P595"><text:span text:style-name="_3c_C_3e_"><text:span text:style-name="T620"><text:tab/>std::cout &lt;&lt; “el maximo es: “ &lt;&lt; maximun(var1, var2); </text:span></text:span><text:span text:style-name="_2f__2f_C"><text:span text:style-name="T620">//no devolverá lo esperado</text:span></text:span></text:p>
      <text:p text:style-name="P595"><text:span text:style-name="_2f__2f_C"><text:span text:style-name="T620"/></text:span></text:p>
      <text:p text:style-name="P595"><text:span text:style-name="_3c_C_3e_"><text:span text:style-name="T619"><text:s/>No devolverá “hola” por que lo que devolverá son </text:span></text:span><text:span text:style-name="_3c_C_3e_"><text:span text:style-name="T352">const char*</text:span></text:span><text:span text:style-name="_3c_C_3e_"><text:span text:style-name="T619"> y eso son punteros. Es decir comparará punteros. Entonces tenemos que hacer una “especialización” específica del template para ciertos tipos de variables:</text:span></text:span></text:p>
      <text:p text:style-name="P595"><text:span text:style-name="_3c_C_3e_"><text:span text:style-name="T619"/></text:span></text:p>
      <text:p text:style-name="P595"><text:soft-page-break/><text:span text:style-name="_3c_C_3e_"><text:span text:style-name="T352">template &lt;typename T&gt; </text:span></text:span><text:span text:style-name="_3c_C_3e_"><text:span text:style-name="T617">T maximun(T</text:span></text:span><text:span text:style-name="_3c_C_3e_"><text:span text:style-name="T620">&amp;</text:span></text:span><text:span text:style-name="_3c_C_3e_"><text:span text:style-name="T617"> a, T</text:span></text:span><text:span text:style-name="_3c_C_3e_"><text:span text:style-name="T620">&amp;</text:span></text:span><text:span text:style-name="_3c_C_3e_"><text:span text:style-name="T617"> b){</text:span></text:span></text:p>
      <text:p text:style-name="P595"><text:span text:style-name="_3c_C_3e_"><text:span text:style-name="T617">return (a &gt; b) ? a : b;}</text:span></text:span></text:p>
      <text:p text:style-name="P595"><text:span text:style-name="_3c_C_2b__2b__3e_"><text:span text:style-name="T352">template &lt;&gt;</text:span></text:span></text:p>
      <text:p text:style-name="P595"><text:span text:style-name="_3c_C_2b__2b__3e_"><text:span text:style-name="T352">const char* maximun(const char* a, const char* b){</text:span></text:span><text:span text:style-name="_2f__2f_C"><text:span text:style-name="T352"><text:tab/>// </text:span></text:span><text:span text:style-name="_2f__2f_C"><text:span text:style-name="T621">podriamos pasar por referencia el puntero: </text:span></text:span><text:span text:style-name="_2f__2f_C"><text:span text:style-name="T352">const char* const&amp; a, </text:span></text:span><text:span text:style-name="_2f__2f_C"><text:span text:style-name="T621">pero copiar un puntero es muy ligero.</text:span></text:span></text:p>
      <text:p text:style-name="P595"><text:span text:style-name="_3c_C_3e_"><text:span text:style-name="T620"><text:tab/>return (std::strcmp(a, b) &gt; 0 ? a : b); </text:span></text:span><text:span text:style-name="_2f__2f_C"><text:span text:style-name="T620">//</text:span></text:span><text:span text:style-name="_2f__2f_C"><text:span text:style-name="T622">strcmp retorna -1 si es menor, 0 iguales o &gt;0 si el primer parametro es menor</text:span></text:span><text:span text:style-name="_3c_C_3e_"><text:span text:style-name="T620">}</text:span></text:span></text:p>
      <text:p text:style-name="P595"><text:span text:style-name="_3c_C_3e_"><text:span text:style-name="T620">int main(){</text:span></text:span></text:p>
      <text:p text:style-name="P595"><text:span text:style-name="_3c_C_3e_"><text:span text:style-name="T620"><text:tab/>std::cout &lt;&lt; “el maximo es: “ &lt;&lt; maximun(var1, var2); </text:span></text:span><text:span text:style-name="_2f__2f_C"><text:span text:style-name="T620">//ahí si que lo devolverá bien</text:span></text:span><text:span text:style-name="_3c_C_3e_"><text:span text:style-name="T620">}</text:span></text:span></text:p>
      <text:p text:style-name="P595"><text:span text:style-name="_3c_C_3e_"><text:span text:style-name="T620"/></text:span></text:p>
      <text:p text:style-name="P596"><text:span text:style-name="_3c_C_3e_"><text:span text:style-name="T623">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352">template &lt;&gt;</text:span></text:span><text:span text:style-name="_3c_C_3e_"><text:span text:style-name="T623">)</text:span></text:span></text:p>
      <text:p text:style-name="P597"><text:span text:style-name="_3c_C_3e_"><text:span text:style-name="T624">PERO, esto también funcionaría si se añadiera sin la expecialización:</text:span></text:span></text:p>
      <text:p text:style-name="P597"><text:span text:style-name="_3c_C_2b__2b__3e_"><text:span text:style-name="T352">const char* maximun(const char* a, const char* b){</text:span></text:span><text:span text:style-name="_2f__2f_C"><text:span text:style-name="T352"><text:tab/></text:span></text:span></text:p>
      <text:p text:style-name="P597"><text:span text:style-name="_3c_C_3e_"><text:span text:style-name="T620"><text:tab/>return (std::strcmp(a, b) &gt; 0 ? a : b); }<text:line-break/></text:span></text:span><text:span text:style-name="_3c_C_3e_"><text:span text:style-name="T624">Es decir, una funcion overloada normal sin especialización (</text:span></text:span><text:span text:style-name="_3c_C_2b__2b__3e_"><text:span text:style-name="T352">template &lt;&gt;</text:span></text:span><text:span text:style-name="_3c_C_3e_"><text:span text:style-name="T624">), por lo que es una cuestión de “completar” la plantilla (con </text:span></text:span><text:span text:style-name="_3c_C_2b__2b__3e_"><text:span text:style-name="T352">template &lt;&gt;</text:span></text:span><text:span text:style-name="_3c_C_3e_"><text:span text:style-name="T624">) o no, para hacer referencia que es una plantilla completa. Vamos.. por claridad y arquitectura.</text:span></text:span></text:p>
      <text:p text:style-name="P597"><text:span text:style-name="_3c_C_3e_"><text:span text:style-name="T624"/></text:span></text:p>
      <text:p text:style-name="P597"><text:span text:style-name="_3c_C_3e_"><text:span text:style-name="T624"/></text:span></text:p>
      <text:h text:style-name="P598" text:outline-level="3"><text:span text:style-name="_3c_C_3e_"><text:span text:style-name="T625">STL (standard template library)</text:span></text:span></text:h>
      <text:h text:style-name="P598" text:outline-level="3"><text:span text:style-name="_3c_C_3e_"><text:span text:style-name="T625">CONTENEDORES E ITERADORES </text:span></text:span></text:h>
      <text:p text:style-name="P599"/>
      <text:p text:style-name="P600"><text:a xlink:type="simple" xlink:href="https://cplusplus.com/reference/stl/" text:style-name="Internet_20_link" text:visited-style-name="Visited_20_Internet_20_Link"><text:span text:style-name="_3c_C_3e_"><text:span text:style-name="T626">https://cplusplus.com/reference/stl/</text:span></text:span></text:a></text:p>
      <text:p text:style-name="P601"><text:span text:style-name="_3c_C_3e_"><text:span text:style-name="T627">Los contenedores permiten meter elementos dentro de ellos y los iteradores son punteros inteligentes que permiten recorrer dichos contenedores. Hay ya un gran puñado de contenedores STL creados:</text:span></text:span></text:p>
      <text:p text:style-name="P602"><text:span text:style-name="_3c_C_3e_"><text:span text:style-name="T627"/></text:span></text:p>
      <text:p text:style-name="P602"><text:span text:style-name="_3c_C_3e_"><text:span text:style-name="T628">STD::VECTOR</text:span></text:span><text:span text:style-name="_3c_C_3e_"><text:span text:style-name="T629">. Secuencial</text:span></text:span></text:p>
      <text:p text:style-name="P602"><text:span text:style-name="_3c_C_2b__2b__3e_"><text:span text:style-name="T352">#include &lt;vector&gt;</text:span></text:span><text:span text:style-name="_2f__2f_C"><text:span text:style-name="T630"> </text:span></text:span></text:p>
      <text:p text:style-name="P603"><text:span text:style-name="_3c_C_3e_"><text:span text:style-name="T631">Encapsula arrays din</text:span></text:span><text:span text:style-name="_3c_C_3e_"><text:span text:style-name="T632">á</text:span></text:span><text:span text:style-name="_3c_C_3e_"><text:span text:style-name="T631">micos en tamaño. Uso:</text:span></text:span></text:p>
      <text:p text:style-name="P603"/>
      <text:p text:style-name="P603"><text:span text:style-name="_3c_C_2b__2b__3e_"><text:span text:style-name="T352">std::vector&lt;</text:span></text:span><text:span text:style-name="_3c_C_3e_"><text:span text:style-name="T352">std::string</text:span></text:span><text:span text:style-name="_3c_C_2b__2b__3e_"><text:span text:style-name="T352">&gt; </text:span></text:span><text:span text:style-name="_3c_C_3e_"><text:span text:style-name="T352">vec_str{"hola", "mundo"};</text:span></text:span><text:span text:style-name="_3c_C_3e_"><text:span text:style-name="T633"> </text:span></text:span><text:span text:style-name="_2f__2f_C"><text:span text:style-name="T633">//c++</text:span></text:span><text:span text:style-name="_2f__2f_C"><text:span text:style-name="T634">11</text:span></text:span><text:span text:style-name="_2f__2f_C"><text:span text:style-name="T633"> !!!!</text:span></text:span></text:p>
      <text:p text:style-name="P603"><text:span text:style-name="_3c_C_2b__2b__3e_"><text:span text:style-name="T352">std::vector&lt;</text:span></text:span><text:span text:style-name="_3c_C_3e_"><text:span text:style-name="T633">std::string</text:span></text:span><text:span text:style-name="_3c_C_2b__2b__3e_"><text:span text:style-name="T352">&gt;</text:span></text:span><text:span text:style-name="_3c_C_3e_"><text:span text:style-name="T633"> vec_str;</text:span></text:span><text:span text:style-name="_2f__2f_C"><text:span text:style-name="T633"> //a partir de aqui c++98</text:span></text:span></text:p>
      <text:p text:style-name="P603"><text:span text:style-name="_3c_C_2b__2b__3e_"><text:span text:style-name="T352">vec_str.push_back(</text:span></text:span><text:span text:style-name="_3c_C_3e_"><text:span text:style-name="T633">"hola"</text:span></text:span><text:span text:style-name="_3c_C_2b__2b__3e_"><text:span text:style-name="T352">)</text:span></text:span><text:span text:style-name="_3c_C_3e_"><text:span text:style-name="T633">;</text:span></text:span></text:p>
      <text:p text:style-name="P603"><text:soft-page-break/><text:span text:style-name="_3c_C_2b__2b__3e_"><text:span text:style-name="T352">vec_str.push_back(</text:span></text:span><text:span text:style-name="_3c_C_3e_"><text:span text:style-name="T633">"mundo"</text:span></text:span><text:span text:style-name="_3c_C_2b__2b__3e_"><text:span text:style-name="T352">)</text:span></text:span><text:span text:style-name="_3c_C_3e_"><text:span text:style-name="T633">;</text:span></text:span></text:p>
      <text:p text:style-name="P603"><text:span text:style-name="_3c_C_3e_"><text:span text:style-name="T633"/></text:span></text:p>
      <text:p text:style-name="P604"><text:span text:style-name="_3c_C_3e_"><text:span text:style-name="T635">Podemos inicializar un mont</text:span></text:span><text:span text:style-name="_3c_C_3e_"><text:span text:style-name="T636">ón</text:span></text:span><text:span text:style-name="_3c_C_3e_"><text:span text:style-name="T635"> de elementos si lo ponemos entre par</text:span></text:span><text:span text:style-name="_3c_C_3e_"><text:span text:style-name="T636">é</text:span></text:span><text:span text:style-name="_3c_C_3e_"><text:span text:style-name="T635">ntesis asi:</text:span></text:span></text:p>
      <text:p text:style-name="P604"><text:span text:style-name="_3c_C_3e_"><text:span text:style-name="T635"/></text:span></text:p>
      <text:p text:style-name="P604"><text:span text:style-name="_3c_C_2b__2b__3e_"><text:span text:style-name="T352">std::vector&lt;int&gt;</text:span></text:span><text:span text:style-name="_3c_C_3e_"><text:span text:style-name="T637"> var1</text:span></text:span><text:span text:style-name="_3c_C_2b__2b__3e_"><text:span text:style-name="T352">(32, 2)</text:span></text:span><text:span text:style-name="_3c_C_3e_"><text:span text:style-name="T637">;</text:span></text:span><text:span text:style-name="_2f__2f_C"><text:span text:style-name="T637"> //crea un vector var1 de 32 elementos todos ellos con valor 2. C++98</text:span></text:span><text:span text:style-name="_2f__2f_C"><text:span text:style-name="T638"> ok</text:span></text:span></text:p>
      <text:p text:style-name="P605"><text:span text:style-name="_3c_C_3e_"><text:span text:style-name="T352">var1.</text:span></text:span><text:span text:style-name="_3c_C_2b__2b__3e_"><text:span text:style-name="T352">at(5)</text:span></text:span><text:span text:style-name="_3c_C_3e_"><text:span text:style-name="T352"> = 42; </text:span></text:span><text:span text:style-name="_2f__2f_C"><text:span text:style-name="T638">//pondr</text:span></text:span><text:span text:style-name="_2f__2f_C"><text:span text:style-name="T639">á</text:span></text:span><text:span text:style-name="_2f__2f_C"><text:span text:style-name="T638"> el SEXTO elemento a 42. El resto se quedar</text:span></text:span><text:span text:style-name="_2f__2f_C"><text:span text:style-name="T639">á</text:span></text:span><text:span text:style-name="_2f__2f_C"><text:span text:style-name="T638"> como 2.</text:span></text:span></text:p>
      <text:p text:style-name="P605"><text:span text:style-name="_3c_C_3e_"><text:span text:style-name="T635"/></text:span></text:p>
      <text:p text:style-name="P606"><text:span text:style-name="_3c_C_3e_"><text:span text:style-name="T640">Si queremos imprimir el vector, podemos usar una funci</text:span></text:span><text:span text:style-name="_3c_C_3e_"><text:span text:style-name="T641">ón</text:span></text:span><text:span text:style-name="_3c_C_3e_"><text:span text:style-name="T640"> propia, pero debemos usar templates, ya que vector puede ser de cualquier tipo:</text:span></text:span></text:p>
      <text:p text:style-name="P606"><text:span text:style-name="_3c_C_3e_"><text:span text:style-name="T640"/></text:span></text:p>
      <text:p text:style-name="P606"><text:span text:style-name="_3c_C_3e_"><text:span text:style-name="T352">template &lt;typename T&gt;</text:span></text:span></text:p>
      <text:p text:style-name="P606"><text:span text:style-name="_3c_C_3e_"><text:span text:style-name="T352">void<text:tab/>print_vector(const </text:span></text:span><text:span text:style-name="_3c_C_2b__2b__3e_"><text:span text:style-name="T352">std::vector&lt;T&gt;</text:span></text:span><text:span text:style-name="_3c_C_3e_"><text:span text:style-name="T352">&amp; vec){</text:span></text:span></text:p>
      <text:p text:style-name="P606"><text:span text:style-name="_3c_C_3e_"><text:span text:style-name="T352"><text:tab/>for (size_t i = 0; i &lt; </text:span></text:span><text:span text:style-name="_3c_C_2b__2b__3e_"><text:span text:style-name="T352">vec.size()</text:span></text:span><text:span text:style-name="_3c_C_3e_"><text:span text:style-name="T352">; i++){</text:span></text:span></text:p>
      <text:p text:style-name="P606"><text:span text:style-name="_3c_C_3e_"><text:span text:style-name="T352"><text:tab/><text:tab/>std::cout &lt;&lt; </text:span></text:span><text:span text:style-name="_3c_C_2b__2b__3e_"><text:span text:style-name="T352">vec[i]</text:span></text:span><text:span text:style-name="_3c_C_3e_"><text:span text:style-name="T352"> &lt;&lt; std::endl;</text:span></text:span></text:p>
      <text:p text:style-name="P606"><text:span text:style-name="_3c_C_3e_"><text:span text:style-name="T352"><text:tab/>}</text:span></text:span></text:p>
      <text:p text:style-name="P606"><text:span text:style-name="_3c_C_3e_"><text:span text:style-name="T352">}</text:span></text:span></text:p>
      <text:p text:style-name="P606"><text:span text:style-name="_3c_C_3e_"><text:span text:style-name="T352"/></text:span></text:p>
      <text:p text:style-name="P607"><text:span text:style-name="_3c_C_3e_"><text:span text:style-name="T642">MODIFICADORES</text:span></text:span><text:span text:style-name="_3c_C_3e_"><text:span text:style-name="T643">:</text:span></text:span></text:p>
      <text:p text:style-name="P607"><text:span text:style-name="_3c_C_2b__2b__3e_"><text:span text:style-name="T352">.at(indice)</text:span></text:span><text:span text:style-name="_3c_C_2b__2b__3e_"><text:span text:style-name="T644"><text:tab/></text:span></text:span><text:span text:style-name="_3c_C_2b__2b__3e_"><text:span text:style-name="T645"><text:tab/><text:tab/><text:tab/><text:tab/><text:tab/></text:span></text:span><text:span text:style-name="_3c_C_3e_"><text:span text:style-name="T643">-&gt; devuelve el valor del vector en dicho </text:span></text:span><text:span text:style-name="_3c_C_3e_"><text:span text:style-name="T646">ín</text:span></text:span><text:span text:style-name="_3c_C_3e_"><text:span text:style-name="T643">dice</text:span></text:span><text:span text:style-name="_3c_C_3e_"><text:span text:style-name="T647">. seria como </text:span></text:span><text:span text:style-name="_3c_C_3e_"><text:span text:style-name="T648"><text:tab/><text:tab/><text:tab/><text:tab/><text:tab/><text:tab/><text:tab/><text:tab/><text:tab/><text:tab/><text:tab/><text:tab/><text:tab/></text:span></text:span><text:span text:style-name="_3c_C_3e_"><text:span text:style-name="T647">var[indice] pero<text:tab/>esta no hace comprobaci</text:span></text:span><text:span text:style-name="_3c_C_3e_"><text:span text:style-name="T649">ón</text:span></text:span><text:span text:style-name="_3c_C_3e_"><text:span text:style-name="T647"> de rango y </text:span></text:span><text:span text:style-name="_3c_C_3e_"><text:span text:style-name="T352">.at</text:span></text:span><text:span text:style-name="_3c_C_3e_"><text:span text:style-name="T647"> s</text:span></text:span><text:span text:style-name="_3c_C_3e_"><text:span text:style-name="T649">í</text:span></text:span><text:span text:style-name="_3c_C_3e_"><text:span text:style-name="T647"> </text:span></text:span><text:span text:style-name="_3c_C_3e_"><text:span text:style-name="T648"><text:tab/><text:tab/><text:tab/><text:tab/><text:tab/><text:tab/><text:tab/><text:tab/><text:tab/><text:tab/><text:tab/><text:tab/></text:span></text:span><text:span text:style-name="_3c_C_3e_"><text:span text:style-name="T647">que lo hace lanzando</text:span></text:span><text:span text:style-name="_3c_C_3e_"><text:span text:style-name="T648"> una </text:span></text:span><text:span text:style-name="_3c_C_3e_"><text:span text:style-name="T647">excepci</text:span></text:span><text:span text:style-name="_3c_C_3e_"><text:span text:style-name="T649">ón</text:span></text:span><text:span text:style-name="_3c_C_3e_"><text:span text:style-name="T647">. </text:span></text:span><text:span text:style-name="_3c_C_3e_"><text:span text:style-name="T352">out_of_range</text:span></text:span></text:p>
      <text:p text:style-name="P607"><text:span text:style-name="_3c_C_2b__2b__3e_"><text:span text:style-name="T352">.front()</text:span></text:span><text:span text:style-name="_3c_C_3e_"><text:span text:style-name="T643"><text:tab/><text:tab/><text:tab/></text:span></text:span><text:span text:style-name="_3c_C_3e_"><text:span text:style-name="T648"><text:tab/><text:tab/><text:tab/><text:tab/><text:tab/></text:span></text:span><text:span text:style-name="_3c_C_3e_"><text:span text:style-name="T643">-&gt; devuelve el primer elemento del vector</text:span></text:span></text:p>
      <text:p text:style-name="P607"><text:span text:style-name="_3c_C_2b__2b__3e_"><text:span text:style-name="T352">.back()<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el </text:span></text:span><text:span text:style-name="_3c_C_3e_"><text:span text:style-name="T646">ú</text:span></text:span><text:span text:style-name="_3c_C_3e_"><text:span text:style-name="T643">ltimo elemento del vector.</text:span></text:span></text:p>
      <text:p text:style-name="P608"><text:span text:style-name="_3c_C_2b__2b__3e_"><text:span text:style-name="T352">.</text:span></text:span><text:span text:style-name="_3c_C_2b__2b__3e_"><text:span text:style-name="T650">data</text:span></text:span><text:span text:style-name="_3c_C_2b__2b__3e_"><text:span text:style-name="T352">()<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text:span></text:span><text:span text:style-name="_3c_C_3e_"><text:span text:style-name="T651">el puntero al primer elemento del vector.</text:span></text:span></text:p>
      <text:p text:style-name="P609"><text:span text:style-name="_3c_C_2b__2b__3e_"><text:span text:style-name="T352">.</text:span></text:span><text:span text:style-name="_3c_C_2b__2b__3e_"><text:span text:style-name="T652">push_back</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al final del vector.</text:span></text:span><text:span text:style-name="_3c_C_3e_"><text:span text:style-name="T654"> O(1)</text:span></text:span></text:p>
      <text:p text:style-name="P610"><text:span text:style-name="_3c_C_2b__2b__3e_"><text:span text:style-name="T352">.</text:span></text:span><text:span text:style-name="_3c_C_2b__2b__3e_"><text:span text:style-name="T655">insert</text:span></text:span><text:span text:style-name="_3c_C_2b__2b__3e_"><text:span text:style-name="T352">(</text:span></text:span><text:span text:style-name="_3c_C_2b__2b__3e_"><text:span text:style-name="T655">it_pos, <text:s/>elemen</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text:span></text:span><text:span text:style-name="_3c_C_3e_"><text:span text:style-name="T654">en la posici</text:span></text:span><text:span text:style-name="_3c_C_3e_"><text:span text:style-name="T656">ón</text:span></text:span><text:span text:style-name="_3c_C_3e_"><text:span text:style-name="T654"> it_pos del vector</text:span></text:span><text:span text:style-name="_3c_C_3e_"><text:span text:style-name="T653">.</text:span></text:span><text:span text:style-name="_3c_C_3e_"><text:span text:style-name="T654"> O(n)</text:span></text:span></text:p>
      <text:p text:style-name="P609"><text:span text:style-name="_3c_C_2b__2b__3e_"><text:span text:style-name="T352">.</text:span></text:span><text:span text:style-name="_3c_C_2b__2b__3e_"><text:span text:style-name="T652">pop_back</text:span></text:span><text:span text:style-name="_3c_C_2b__2b__3e_"><text:span text:style-name="T352">()<text:tab/></text:span></text:span><text:span text:style-name="_3c_C_2b__2b__3e_"><text:span text:style-name="T645"><text:tab/><text:tab/><text:tab/><text:tab/><text:tab/></text:span></text:span><text:span text:style-name="_3c_C_3e_"><text:span text:style-name="T643">-&gt; </text:span></text:span><text:span text:style-name="_3c_C_3e_"><text:span text:style-name="T653">Quita el </text:span></text:span><text:span text:style-name="_3c_C_3e_"><text:span text:style-name="T657">ú</text:span></text:span><text:span text:style-name="_3c_C_3e_"><text:span text:style-name="T653">ltimo elemento.</text:span></text:span><text:span text:style-name="_3c_C_3e_"><text:span text:style-name="T654"> O(1)</text:span></text:span></text:p>
      <text:p text:style-name="P611"><text:span text:style-name="_3c_C_2b__2b__3e_"><text:span text:style-name="T352">.</text:span></text:span><text:span text:style-name="_3c_C_2b__2b__3e_"><text:span text:style-name="T658">size</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l vector</text:span></text:span></text:p>
      <text:p text:style-name="P612"><text:span text:style-name="_3c_C_2b__2b__3e_"><text:span text:style-name="T352">.</text:span></text:span><text:span text:style-name="_3c_C_2b__2b__3e_"><text:span text:style-name="T661">capacity</text:span></text:span><text:span text:style-name="_3c_C_2b__2b__3e_"><text:span text:style-name="T352">()<text:tab/></text:span></text:span><text:span text:style-name="_3c_C_2b__2b__3e_"><text:span text:style-name="T645"><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l vector</text:span></text:span><text:span text:style-name="_3c_C_3e_"><text:span text:style-name="T662"> que puede <text:tab/><text:tab/><text:tab/><text:tab/><text:tab/><text:tab/><text:tab/><text:tab/><text:tab/><text:tab/><text:tab/><text:tab/><text:tab/>almacenar. size &lt;= capacity siempre. </text:span></text:span></text:p>
      <text:p text:style-name="P613"><text:span text:style-name="_3c_C_2b__2b__3e_"><text:span text:style-name="T352">.</text:span></text:span><text:span text:style-name="_3c_C_2b__2b__3e_"><text:span text:style-name="T663">clear</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64">vacia toda la colecci</text:span></text:span><text:span text:style-name="_3c_C_3e_"><text:span text:style-name="T665">ó</text:span></text:span><text:span text:style-name="_3c_C_3e_"><text:span text:style-name="T664">n y lo deja con un size de 0</text:span></text:span></text:p>
      <text:p text:style-name="P611"><text:span text:style-name="_3c_C_3e_"><text:span text:style-name="T659"/></text:span></text:p>
      <text:p text:style-name="P611"><text:span text:style-name="_3c_C_3e_"><text:span text:style-name="T659"/></text:span></text:p>
      <text:p text:style-name="P614"><text:span text:style-name="_3c_C_3e_"><text:span text:style-name="T628"/></text:span></text:p>
      <text:p text:style-name="P614"><text:span text:style-name="_3c_C_3e_"><text:span text:style-name="T628"/></text:span></text:p>
      <text:p text:style-name="P614"><text:soft-page-break/><text:span text:style-name="_3c_C_3e_"><text:span text:style-name="T628">STD::</text:span></text:span><text:span text:style-name="_3c_C_3e_"><text:span text:style-name="T629">DEQUE (double ended queue). por secuencia</text:span></text:span></text:p>
      <text:p text:style-name="P614"><text:span text:style-name="_3c_C_2b__2b__3e_"><text:span text:style-name="T352">#include &lt;</text:span></text:span><text:span text:style-name="_3c_C_2b__2b__3e_"><text:span text:style-name="T655">deque</text:span></text:span><text:span text:style-name="_3c_C_2b__2b__3e_"><text:span text:style-name="T352">&gt;</text:span></text:span></text:p>
      <text:p text:style-name="P614"><text:span text:style-name="_3c_C_3e_"><text:span text:style-name="T666">Est</text:span></text:span><text:span text:style-name="_3c_C_3e_"><text:span text:style-name="T667">á</text:span></text:span><text:span text:style-name="_3c_C_3e_"><text:span text:style-name="T666"> diseñada para mover contenido del final y principio de la secuencia de la colecci</text:span></text:span><text:span text:style-name="_3c_C_3e_"><text:span text:style-name="T667">ón y no está almacenada continuamente en memoria.</text:span></text:span></text:p>
      <text:p text:style-name="P614"><text:span text:style-name="_3c_C_3e_"><text:span text:style-name="T667"/></text:span></text:p>
      <text:p text:style-name="P615"><text:span text:style-name="_3c_C_2b__2b__3e_"><text:span text:style-name="T352">std::deque</text:span></text:span><text:span text:style-name="_3c_C_3e_"><text:span text:style-name="T352">&lt;type&gt; variable;</text:span></text:span></text:p>
      <text:p text:style-name="P615"><text:span text:style-name="_3c_C_3e_"><text:span text:style-name="T352"/></text:span></text:p>
      <text:p text:style-name="P616"><text:span text:style-name="_3c_C_3e_"><text:span text:style-name="T642">MODIFICADORES</text:span></text:span><text:span text:style-name="_3c_C_3e_"><text:span text:style-name="T643">:</text:span></text:span></text:p>
      <text:p text:style-name="P616"><text:span text:style-name="_3c_C_2b__2b__3e_"><text:span text:style-name="T352">.at(indice)</text:span></text:span><text:span text:style-name="_3c_C_2b__2b__3e_"><text:span text:style-name="T644"><text:tab/></text:span></text:span><text:span text:style-name="_3c_C_2b__2b__3e_"><text:span text:style-name="T645"><text:tab/><text:tab/><text:tab/><text:tab/><text:tab/></text:span></text:span><text:span text:style-name="_3c_C_3e_"><text:span text:style-name="T643">-&gt; devuelve el valor de</text:span></text:span><text:span text:style-name="_3c_C_3e_"><text:span text:style-name="T668"> la colecci</text:span></text:span><text:span text:style-name="_3c_C_3e_"><text:span text:style-name="T669">ón</text:span></text:span><text:span text:style-name="_3c_C_3e_"><text:span text:style-name="T643"> en dicho </text:span></text:span><text:span text:style-name="_3c_C_3e_"><text:span text:style-name="T646">ín</text:span></text:span><text:span text:style-name="_3c_C_3e_"><text:span text:style-name="T643">dice</text:span></text:span><text:span text:style-name="_3c_C_3e_"><text:span text:style-name="T647">. seria como </text:span></text:span><text:span text:style-name="_3c_C_3e_"><text:span text:style-name="T648"><text:tab/><text:tab/><text:tab/><text:tab/><text:tab/><text:tab/><text:tab/><text:tab/><text:tab/><text:tab/><text:tab/></text:span></text:span><text:span text:style-name="_3c_C_3e_"><text:span text:style-name="T668">coleccion</text:span></text:span><text:span text:style-name="_3c_C_3e_"><text:span text:style-name="T647">[indice] pero</text:span></text:span><text:span text:style-name="_3c_C_3e_"><text:span text:style-name="T668"> </text:span></text:span><text:span text:style-name="_3c_C_3e_"><text:span text:style-name="T647">esta no hace comprobaci</text:span></text:span><text:span text:style-name="_3c_C_3e_"><text:span text:style-name="T649">ón</text:span></text:span><text:span text:style-name="_3c_C_3e_"><text:span text:style-name="T647"> de rango y </text:span></text:span><text:span text:style-name="_3c_C_3e_"><text:span text:style-name="T668"><text:tab/><text:tab/><text:tab/><text:tab/><text:tab/><text:tab/><text:tab/><text:tab/><text:tab/><text:tab/><text:tab/></text:span></text:span><text:span text:style-name="_3c_C_3e_"><text:span text:style-name="T352">.at</text:span></text:span><text:span text:style-name="_3c_C_3e_"><text:span text:style-name="T647"> s</text:span></text:span><text:span text:style-name="_3c_C_3e_"><text:span text:style-name="T649">í</text:span></text:span><text:span text:style-name="_3c_C_3e_"><text:span text:style-name="T669"> </text:span></text:span><text:span text:style-name="_3c_C_3e_"><text:span text:style-name="T647">que lo hace lanzando</text:span></text:span><text:span text:style-name="_3c_C_3e_"><text:span text:style-name="T648"> una </text:span></text:span><text:span text:style-name="_3c_C_3e_"><text:span text:style-name="T647">excepci</text:span></text:span><text:span text:style-name="_3c_C_3e_"><text:span text:style-name="T649">ón</text:span></text:span><text:span text:style-name="_3c_C_3e_"><text:span text:style-name="T647">. </text:span></text:span><text:span text:style-name="_3c_C_3e_"><text:span text:style-name="T352">out_of_range</text:span></text:span></text:p>
      <text:p text:style-name="P616"><text:span text:style-name="_3c_C_2b__2b__3e_"><text:span text:style-name="T352">.front()</text:span></text:span><text:span text:style-name="_3c_C_3e_"><text:span text:style-name="T643"><text:tab/><text:tab/><text:tab/></text:span></text:span><text:span text:style-name="_3c_C_3e_"><text:span text:style-name="T648"><text:tab/><text:tab/><text:tab/><text:tab/><text:tab/></text:span></text:span><text:span text:style-name="_3c_C_3e_"><text:span text:style-name="T643">-&gt; devuelve el primer elemento de</text:span></text:span><text:span text:style-name="_3c_C_3e_"><text:span text:style-name="T668"> la colecci</text:span></text:span><text:span text:style-name="_3c_C_3e_"><text:span text:style-name="T669">ón</text:span></text:span></text:p>
      <text:p text:style-name="P616"><text:span text:style-name="_3c_C_2b__2b__3e_"><text:span text:style-name="T352">.back()<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el </text:span></text:span><text:span text:style-name="_3c_C_3e_"><text:span text:style-name="T646">ú</text:span></text:span><text:span text:style-name="_3c_C_3e_"><text:span text:style-name="T643">ltimo elemento de</text:span></text:span><text:span text:style-name="_3c_C_3e_"><text:span text:style-name="T670"> la colecci</text:span></text:span><text:span text:style-name="_3c_C_3e_"><text:span text:style-name="T671">ón</text:span></text:span><text:span text:style-name="_3c_C_3e_"><text:span text:style-name="T643">.</text:span></text:span></text:p>
      <text:p text:style-name="P616"><text:span text:style-name="_3c_C_2b__2b__3e_"><text:span text:style-name="T352">.</text:span></text:span><text:span text:style-name="_3c_C_2b__2b__3e_"><text:span text:style-name="T652">push_back</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al final de</text:span></text:span><text:span text:style-name="_3c_C_3e_"><text:span text:style-name="T670"> la</text:span></text:span><text:span text:style-name="_3c_C_3e_"><text:span text:style-name="T653"> </text:span></text:span><text:span text:style-name="_3c_C_3e_"><text:span text:style-name="T670">colecci</text:span></text:span><text:span text:style-name="_3c_C_3e_"><text:span text:style-name="T671">ón</text:span></text:span><text:span text:style-name="_3c_C_3e_"><text:span text:style-name="T653">.</text:span></text:span><text:span text:style-name="_3c_C_3e_"><text:span text:style-name="T654"> O(1)</text:span></text:span></text:p>
      <text:p text:style-name="P617"><text:span text:style-name="_3c_C_2b__2b__3e_"><text:span text:style-name="T352">.</text:span></text:span><text:span text:style-name="_3c_C_2b__2b__3e_"><text:span text:style-name="T652">push_</text:span></text:span><text:span text:style-name="_3c_C_2b__2b__3e_"><text:span text:style-name="T672">front</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72"><text:tab/></text:span></text:span><text:span text:style-name="_3c_C_2b__2b__3e_"><text:span text:style-name="T645"><text:tab/></text:span></text:span><text:span text:style-name="_3c_C_3e_"><text:span text:style-name="T643">-&gt; </text:span></text:span><text:span text:style-name="_3c_C_3e_"><text:span text:style-name="T653">pone elemento al </text:span></text:span><text:span text:style-name="_3c_C_3e_"><text:span text:style-name="T670">principio</text:span></text:span><text:span text:style-name="_3c_C_3e_"><text:span text:style-name="T653"> de</text:span></text:span><text:span text:style-name="_3c_C_3e_"><text:span text:style-name="T670"> la</text:span></text:span><text:span text:style-name="_3c_C_3e_"><text:span text:style-name="T653"> </text:span></text:span><text:span text:style-name="_3c_C_3e_"><text:span text:style-name="T670">colecci</text:span></text:span><text:span text:style-name="_3c_C_3e_"><text:span text:style-name="T671">ón</text:span></text:span><text:span text:style-name="_3c_C_3e_"><text:span text:style-name="T653">.</text:span></text:span><text:span text:style-name="_3c_C_3e_"><text:span text:style-name="T654"> O(1)</text:span></text:span></text:p>
      <text:p text:style-name="P610"><text:span text:style-name="_3c_C_2b__2b__3e_"><text:span text:style-name="T352">.</text:span></text:span><text:span text:style-name="_3c_C_2b__2b__3e_"><text:span text:style-name="T655">insert</text:span></text:span><text:span text:style-name="_3c_C_2b__2b__3e_"><text:span text:style-name="T352">(</text:span></text:span><text:span text:style-name="_3c_C_2b__2b__3e_"><text:span text:style-name="T655">it_pos, <text:s/>elemen</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text:span></text:span><text:span text:style-name="_3c_C_3e_"><text:span text:style-name="T654">en la posici</text:span></text:span><text:span text:style-name="_3c_C_3e_"><text:span text:style-name="T656">ón</text:span></text:span><text:span text:style-name="_3c_C_3e_"><text:span text:style-name="T654"> it_pos de la colecci</text:span></text:span><text:span text:style-name="_3c_C_3e_"><text:span text:style-name="T656">ón</text:span></text:span><text:span text:style-name="_3c_C_3e_"><text:span text:style-name="T653">.</text:span></text:span><text:span text:style-name="_3c_C_3e_"><text:span text:style-name="T654"> O(n)</text:span></text:span></text:p>
      <text:p text:style-name="P616"><text:span text:style-name="_3c_C_2b__2b__3e_"><text:span text:style-name="T352">.</text:span></text:span><text:span text:style-name="_3c_C_2b__2b__3e_"><text:span text:style-name="T652">pop_back</text:span></text:span><text:span text:style-name="_3c_C_2b__2b__3e_"><text:span text:style-name="T352">()<text:tab/></text:span></text:span><text:span text:style-name="_3c_C_2b__2b__3e_"><text:span text:style-name="T645"><text:tab/><text:tab/><text:tab/><text:tab/><text:tab/></text:span></text:span><text:span text:style-name="_3c_C_3e_"><text:span text:style-name="T643">-&gt; </text:span></text:span><text:span text:style-name="_3c_C_3e_"><text:span text:style-name="T653">Quita el </text:span></text:span><text:span text:style-name="_3c_C_3e_"><text:span text:style-name="T657">ú</text:span></text:span><text:span text:style-name="_3c_C_3e_"><text:span text:style-name="T653">ltimo elemento.</text:span></text:span><text:span text:style-name="_3c_C_3e_"><text:span text:style-name="T654"> O(1)</text:span></text:span></text:p>
      <text:p text:style-name="P617"><text:span text:style-name="_3c_C_2b__2b__3e_"><text:span text:style-name="T352">.</text:span></text:span><text:span text:style-name="_3c_C_2b__2b__3e_"><text:span text:style-name="T652">pop_</text:span></text:span><text:span text:style-name="_3c_C_2b__2b__3e_"><text:span text:style-name="T672">front</text:span></text:span><text:span text:style-name="_3c_C_2b__2b__3e_"><text:span text:style-name="T352">()<text:tab/></text:span></text:span><text:span text:style-name="_3c_C_2b__2b__3e_"><text:span text:style-name="T645"><text:tab/><text:tab/><text:tab/><text:tab/><text:tab/></text:span></text:span><text:span text:style-name="_3c_C_3e_"><text:span text:style-name="T643">-&gt; </text:span></text:span><text:span text:style-name="_3c_C_3e_"><text:span text:style-name="T653">Quita el </text:span></text:span><text:span text:style-name="_3c_C_3e_"><text:span text:style-name="T670">prime</text:span></text:span><text:span text:style-name="_3c_C_3e_"><text:span text:style-name="T653"> elemento.</text:span></text:span><text:span text:style-name="_3c_C_3e_"><text:span text:style-name="T654"> O(1)</text:span></text:span></text:p>
      <text:p text:style-name="P616"><text:span text:style-name="_3c_C_2b__2b__3e_"><text:span text:style-name="T352">.</text:span></text:span><text:span text:style-name="_3c_C_2b__2b__3e_"><text:span text:style-name="T658">size</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text:span></text:span><text:span text:style-name="_3c_C_3e_"><text:span text:style-name="T670"> la colecci</text:span></text:span><text:span text:style-name="_3c_C_3e_"><text:span text:style-name="T671">ón</text:span></text:span></text:p>
      <text:p text:style-name="P616"><text:span text:style-name="_3c_C_2b__2b__3e_"><text:span text:style-name="T352">.</text:span></text:span><text:span text:style-name="_3c_C_2b__2b__3e_"><text:span text:style-name="T661">capacity</text:span></text:span><text:span text:style-name="_3c_C_2b__2b__3e_"><text:span text:style-name="T352">()<text:tab/></text:span></text:span><text:span text:style-name="_3c_C_2b__2b__3e_"><text:span text:style-name="T645"><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text:span></text:span><text:span text:style-name="_3c_C_3e_"><text:span text:style-name="T670"> la colecci</text:span></text:span><text:span text:style-name="_3c_C_3e_"><text:span text:style-name="T671">ón</text:span></text:span><text:span text:style-name="_3c_C_3e_"><text:span text:style-name="T662"> que puede <text:tab/><text:tab/><text:tab/><text:tab/><text:tab/><text:tab/><text:tab/><text:tab/><text:tab/><text:tab/><text:tab/>almacenar. size &lt;= capacity siempre. </text:span></text:span></text:p>
      <text:p text:style-name="P618"><text:span text:style-name="_3c_C_2b__2b__3e_"><text:span text:style-name="T352">.</text:span></text:span><text:span text:style-name="_3c_C_2b__2b__3e_"><text:span text:style-name="T663">clear</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64">vacia toda la colecci</text:span></text:span><text:span text:style-name="_3c_C_3e_"><text:span text:style-name="T665">ó</text:span></text:span><text:span text:style-name="_3c_C_3e_"><text:span text:style-name="T664">n y lo deja con un size de 0</text:span></text:span></text:p>
      <text:p text:style-name="P611"><text:span text:style-name="_3c_C_3e_"><text:span text:style-name="T659"/></text:span></text:p>
      <text:p text:style-name="P611"><text:span text:style-name="_3c_C_3e_"><text:span text:style-name="T659"/></text:span></text:p>
      <text:p text:style-name="P610"><text:span text:style-name="_3c_C_3e_"><text:span text:style-name="T628">STD::</text:span></text:span><text:span text:style-name="_3c_C_3e_"><text:span text:style-name="T673">LIST</text:span></text:span><text:span text:style-name="_3c_C_3e_"><text:span text:style-name="T629"> </text:span></text:span></text:p>
      <text:p text:style-name="P610"><text:span text:style-name="_3c_C_2b__2b__3e_"><text:span text:style-name="T352">#include &lt;</text:span></text:span><text:span text:style-name="_3c_C_2b__2b__3e_"><text:span text:style-name="T655">list</text:span></text:span><text:span text:style-name="_3c_C_2b__2b__3e_"><text:span text:style-name="T352">&gt;</text:span></text:span></text:p>
      <text:p text:style-name="P610"><text:span text:style-name="_3c_C_3e_"><text:span text:style-name="T666">Es</text:span></text:span><text:span text:style-name="_3c_C_3e_"><text:span text:style-name="T674"> como un deque, pero menos costoso a la hora de insertar o elminar contenido de el medio siendo O(1) su costo. Pero eso s</text:span></text:span><text:span text:style-name="_3c_C_3e_"><text:span text:style-name="T675">í</text:span></text:span><text:span text:style-name="_3c_C_3e_"><text:span text:style-name="T674">, no tiene acceso por operador </text:span></text:span><text:span text:style-name="_3c_C_3e_"><text:span text:style-name="T675">[] ni .at()</text:span></text:span></text:p>
      <text:p text:style-name="P611"><text:span text:style-name="_3c_C_3e_"><text:span text:style-name="T659"/></text:span></text:p>
      <text:p text:style-name="P619"><text:span text:style-name="_3c_C_2b__2b__3e_"><text:span text:style-name="T352">std::</text:span></text:span><text:span text:style-name="_3c_C_2b__2b__3e_"><text:span text:style-name="T676">list</text:span></text:span><text:span text:style-name="_3c_C_3e_"><text:span text:style-name="T352">&lt;type&gt; variable;</text:span></text:span></text:p>
      <text:p text:style-name="P611"><text:span text:style-name="_3c_C_3e_"><text:span text:style-name="T659"/></text:span></text:p>
      <text:p text:style-name="P619"><text:span text:style-name="_3c_C_3e_"><text:span text:style-name="T642">MODIFICADORES</text:span></text:span><text:span text:style-name="_3c_C_3e_"><text:span text:style-name="T643">:</text:span></text:span></text:p>
      <text:p text:style-name="P619"><text:span text:style-name="_3c_C_2b__2b__3e_"><text:span text:style-name="T352">.front()</text:span></text:span><text:span text:style-name="_3c_C_3e_"><text:span text:style-name="T643"><text:tab/><text:tab/><text:tab/></text:span></text:span><text:span text:style-name="_3c_C_3e_"><text:span text:style-name="T648"><text:tab/><text:tab/><text:tab/><text:tab/><text:tab/></text:span></text:span><text:span text:style-name="_3c_C_3e_"><text:span text:style-name="T643">-&gt; devuelve el primer elemento de</text:span></text:span><text:span text:style-name="_3c_C_3e_"><text:span text:style-name="T668"> la colecci</text:span></text:span><text:span text:style-name="_3c_C_3e_"><text:span text:style-name="T669">ón</text:span></text:span></text:p>
      <text:p text:style-name="P619"><text:span text:style-name="_3c_C_2b__2b__3e_"><text:span text:style-name="T352">.back()<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el </text:span></text:span><text:span text:style-name="_3c_C_3e_"><text:span text:style-name="T646">ú</text:span></text:span><text:span text:style-name="_3c_C_3e_"><text:span text:style-name="T643">ltimo elemento de</text:span></text:span><text:span text:style-name="_3c_C_3e_"><text:span text:style-name="T670"> la colecci</text:span></text:span><text:span text:style-name="_3c_C_3e_"><text:span text:style-name="T671">ón</text:span></text:span><text:span text:style-name="_3c_C_3e_"><text:span text:style-name="T643">.</text:span></text:span></text:p>
      <text:p text:style-name="P619"><text:span text:style-name="_3c_C_2b__2b__3e_"><text:span text:style-name="T352">.</text:span></text:span><text:span text:style-name="_3c_C_2b__2b__3e_"><text:span text:style-name="T652">push_back</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al final de</text:span></text:span><text:span text:style-name="_3c_C_3e_"><text:span text:style-name="T670"> la</text:span></text:span><text:span text:style-name="_3c_C_3e_"><text:span text:style-name="T653"> </text:span></text:span><text:span text:style-name="_3c_C_3e_"><text:span text:style-name="T670">colecci</text:span></text:span><text:span text:style-name="_3c_C_3e_"><text:span text:style-name="T671">ón</text:span></text:span><text:span text:style-name="_3c_C_3e_"><text:span text:style-name="T653">.</text:span></text:span><text:span text:style-name="_3c_C_3e_"><text:span text:style-name="T654"> O(1)</text:span></text:span></text:p>
      <text:p text:style-name="P619"><text:soft-page-break/><text:span text:style-name="_3c_C_2b__2b__3e_"><text:span text:style-name="T352">.</text:span></text:span><text:span text:style-name="_3c_C_2b__2b__3e_"><text:span text:style-name="T652">push_</text:span></text:span><text:span text:style-name="_3c_C_2b__2b__3e_"><text:span text:style-name="T672">front</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72"><text:tab/></text:span></text:span><text:span text:style-name="_3c_C_2b__2b__3e_"><text:span text:style-name="T645"><text:tab/></text:span></text:span><text:span text:style-name="_3c_C_3e_"><text:span text:style-name="T643">-&gt; </text:span></text:span><text:span text:style-name="_3c_C_3e_"><text:span text:style-name="T653">pone elemento al </text:span></text:span><text:span text:style-name="_3c_C_3e_"><text:span text:style-name="T670">principio</text:span></text:span><text:span text:style-name="_3c_C_3e_"><text:span text:style-name="T653"> de</text:span></text:span><text:span text:style-name="_3c_C_3e_"><text:span text:style-name="T670"> la</text:span></text:span><text:span text:style-name="_3c_C_3e_"><text:span text:style-name="T653"> </text:span></text:span><text:span text:style-name="_3c_C_3e_"><text:span text:style-name="T670">colecci</text:span></text:span><text:span text:style-name="_3c_C_3e_"><text:span text:style-name="T671">ón</text:span></text:span><text:span text:style-name="_3c_C_3e_"><text:span text:style-name="T653">.</text:span></text:span><text:span text:style-name="_3c_C_3e_"><text:span text:style-name="T654"> O(1)</text:span></text:span></text:p>
      <text:p text:style-name="P619"><text:span text:style-name="_3c_C_2b__2b__3e_"><text:span text:style-name="T352">.</text:span></text:span><text:span text:style-name="_3c_C_2b__2b__3e_"><text:span text:style-name="T655">insert</text:span></text:span><text:span text:style-name="_3c_C_2b__2b__3e_"><text:span text:style-name="T352">(</text:span></text:span><text:span text:style-name="_3c_C_2b__2b__3e_"><text:span text:style-name="T655">it_pos, <text:s/>elemen</text:span></text:span><text:span text:style-name="_3c_C_2b__2b__3e_"><text:span text:style-name="T352">)</text:span></text:span><text:span text:style-name="_3c_C_2b__2b__3e_"><text:span text:style-name="T645"><text:tab/></text:span></text:span><text:span text:style-name="_3c_C_3e_"><text:span text:style-name="T643">-&gt; </text:span></text:span><text:span text:style-name="_3c_C_3e_"><text:span text:style-name="T653">pone elemento </text:span></text:span><text:span text:style-name="_3c_C_3e_"><text:span text:style-name="T654">en la posici</text:span></text:span><text:span text:style-name="_3c_C_3e_"><text:span text:style-name="T656">ón</text:span></text:span><text:span text:style-name="_3c_C_3e_"><text:span text:style-name="T654"> it_pos de la colecci</text:span></text:span><text:span text:style-name="_3c_C_3e_"><text:span text:style-name="T656">ón</text:span></text:span><text:span text:style-name="_3c_C_3e_"><text:span text:style-name="T653">.</text:span></text:span><text:span text:style-name="_3c_C_3e_"><text:span text:style-name="T654"> O(</text:span></text:span><text:span text:style-name="_3c_C_3e_"><text:span text:style-name="T674">1</text:span></text:span><text:span text:style-name="_3c_C_3e_"><text:span text:style-name="T654">)</text:span></text:span></text:p>
      <text:p text:style-name="P619"><text:span text:style-name="_3c_C_2b__2b__3e_"><text:span text:style-name="T352">.</text:span></text:span><text:span text:style-name="_3c_C_2b__2b__3e_"><text:span text:style-name="T652">pop_back</text:span></text:span><text:span text:style-name="_3c_C_2b__2b__3e_"><text:span text:style-name="T352">()<text:tab/></text:span></text:span><text:span text:style-name="_3c_C_2b__2b__3e_"><text:span text:style-name="T645"><text:tab/><text:tab/><text:tab/><text:tab/><text:tab/></text:span></text:span><text:span text:style-name="_3c_C_3e_"><text:span text:style-name="T643">-&gt; </text:span></text:span><text:span text:style-name="_3c_C_3e_"><text:span text:style-name="T653">Quita el </text:span></text:span><text:span text:style-name="_3c_C_3e_"><text:span text:style-name="T657">ú</text:span></text:span><text:span text:style-name="_3c_C_3e_"><text:span text:style-name="T653">ltimo elemento.</text:span></text:span><text:span text:style-name="_3c_C_3e_"><text:span text:style-name="T654"> O(1)</text:span></text:span></text:p>
      <text:p text:style-name="P619"><text:span text:style-name="_3c_C_2b__2b__3e_"><text:span text:style-name="T352">.</text:span></text:span><text:span text:style-name="_3c_C_2b__2b__3e_"><text:span text:style-name="T652">pop_</text:span></text:span><text:span text:style-name="_3c_C_2b__2b__3e_"><text:span text:style-name="T672">front</text:span></text:span><text:span text:style-name="_3c_C_2b__2b__3e_"><text:span text:style-name="T352">()<text:tab/></text:span></text:span><text:span text:style-name="_3c_C_2b__2b__3e_"><text:span text:style-name="T645"><text:tab/><text:tab/><text:tab/><text:tab/><text:tab/></text:span></text:span><text:span text:style-name="_3c_C_3e_"><text:span text:style-name="T643">-&gt; </text:span></text:span><text:span text:style-name="_3c_C_3e_"><text:span text:style-name="T653">Quita el </text:span></text:span><text:span text:style-name="_3c_C_3e_"><text:span text:style-name="T670">prime</text:span></text:span><text:span text:style-name="_3c_C_3e_"><text:span text:style-name="T653"> elemento.</text:span></text:span><text:span text:style-name="_3c_C_3e_"><text:span text:style-name="T654"> O(1)</text:span></text:span></text:p>
      <text:p text:style-name="P619"><text:span text:style-name="_3c_C_2b__2b__3e_"><text:span text:style-name="T352">.</text:span></text:span><text:span text:style-name="_3c_C_2b__2b__3e_"><text:span text:style-name="T658">size</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text:span></text:span><text:span text:style-name="_3c_C_3e_"><text:span text:style-name="T670"> la colecci</text:span></text:span><text:span text:style-name="_3c_C_3e_"><text:span text:style-name="T671">ón</text:span></text:span></text:p>
      <text:p text:style-name="P619"><text:span text:style-name="_3c_C_2b__2b__3e_"><text:span text:style-name="T352">.</text:span></text:span><text:span text:style-name="_3c_C_2b__2b__3e_"><text:span text:style-name="T663">clear</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64">vacia toda la colecci</text:span></text:span><text:span text:style-name="_3c_C_3e_"><text:span text:style-name="T665">ó</text:span></text:span><text:span text:style-name="_3c_C_3e_"><text:span text:style-name="T664">n y lo deja con un size de 0</text:span></text:span></text:p>
      <text:p text:style-name="P611"><text:span text:style-name="_3c_C_3e_"><text:span text:style-name="T659"/></text:span></text:p>
      <text:p text:style-name="P620"><text:span text:style-name="_3c_C_3e_"><text:span text:style-name="T628">STD::</text:span></text:span><text:span text:style-name="_3c_C_3e_"><text:span text:style-name="T677">PAIR</text:span></text:span><text:span text:style-name="_3c_C_3e_"><text:span text:style-name="T629"> </text:span></text:span></text:p>
      <text:p text:style-name="P620"><text:span text:style-name="_3c_C_2b__2b__3e_"><text:span text:style-name="T352">#include &lt;</text:span></text:span><text:span text:style-name="_3c_C_2b__2b__3e_"><text:span text:style-name="T678">utility</text:span></text:span><text:span text:style-name="_3c_C_2b__2b__3e_"><text:span text:style-name="T352">&gt;</text:span></text:span></text:p>
      <text:p text:style-name="P620"><text:span text:style-name="_3c_C_3e_"><text:span text:style-name="T679">Es una colección </text:span></text:span><text:span text:style-name="_3c_C_3e_"><text:span text:style-name="T680">para ser almacenados pares de cosas</text:span></text:span><text:span text:style-name="_3c_C_3e_"><text:span text:style-name="T681">, pero se tratan como un único elemento</text:span></text:span><text:span text:style-name="_3c_C_3e_"><text:span text:style-name="T680">:</text:span></text:span></text:p>
      <text:p text:style-name="P620"><text:span text:style-name="_3c_C_3e_"><text:span text:style-name="T680"/></text:span></text:p>
      <text:p text:style-name="P620"><text:span text:style-name="_3c_C_2b__2b__3e_"><text:span text:style-name="T352">std::pair</text:span></text:span><text:span text:style-name="_3c_C_3e_"><text:span text:style-name="T352">&lt;int, std::string&gt; p(1, "hola");</text:span></text:span><text:span text:style-name="_2f__2f_C"><text:span text:style-name="T678"> //valido en C++98</text:span></text:span></text:p>
      <text:p text:style-name="P611"><text:span text:style-name="_3c_C_3e_"><text:span text:style-name="T659"/></text:span></text:p>
      <text:p text:style-name="P621"><text:span text:style-name="_3c_C_3e_"><text:span text:style-name="T682">En C++11 se puede usar:<text:line-break/><text:line-break/></text:span></text:span><text:span text:style-name="_3c_C_3e_"><text:span text:style-name="T352">auto p = </text:span></text:span><text:span text:style-name="_3c_C_2b__2b__3e_"><text:span text:style-name="T352">std::make_pair</text:span></text:span><text:span text:style-name="_3c_C_3e_"><text:span text:style-name="T352">(1, "hola"); </text:span></text:span><text:span text:style-name="_2f__2f_C"><text:span text:style-name="T352">// C++11</text:span></text:span></text:p>
      <text:p text:style-name="P621"><text:span text:style-name="_2f__2f_C"><text:span text:style-name="T352"/></text:span></text:p>
      <text:p text:style-name="P622"><text:span text:style-name="_3c_C_3e_"><text:span text:style-name="T683">Se puede meter pares dentro de otra colección, por ejemplo:<text:line-break/><text:line-break/></text:span></text:span><text:span text:style-name="_3c_C_3e_"><text:span text:style-name="T352">std::vector&lt;std::pair&lt;int, std::string&gt;&gt; var; </text:span></text:span><text:span text:style-name="_2f__2f_C"><text:span text:style-name="T352">//meterá en un vector, pares.</text:span></text:span></text:p>
      <text:p text:style-name="P621"><text:span text:style-name="_2f__2f_C"><text:span text:style-name="T352"/></text:span></text:p>
      <text:p text:style-name="P623"><text:span text:style-name="_3c_C_3e_"><text:span text:style-name="T642">MODIFICADORES</text:span></text:span><text:span text:style-name="_3c_C_3e_"><text:span text:style-name="T643">:</text:span></text:span></text:p>
      <text:p text:style-name="P623"><text:span text:style-name="_3c_C_2b__2b__3e_"><text:span text:style-name="T352">.</text:span></text:span><text:span text:style-name="_3c_C_2b__2b__3e_"><text:span text:style-name="T684">first</text:span></text:span><text:span text:style-name="_3c_C_3e_"><text:span text:style-name="T643"><text:tab/></text:span></text:span><text:span text:style-name="_3c_C_3e_"><text:span text:style-name="T685"><text:tab/></text:span></text:span><text:span text:style-name="_3c_C_3e_"><text:span text:style-name="T648"><text:tab/><text:tab/><text:tab/><text:tab/><text:tab/></text:span></text:span><text:span text:style-name="_3c_C_3e_"><text:span text:style-name="T643">-&gt; devuelve el primer elemento de</text:span></text:span><text:span text:style-name="_3c_C_3e_"><text:span text:style-name="T685">l par</text:span></text:span></text:p>
      <text:p text:style-name="P623"><text:span text:style-name="_3c_C_2b__2b__3e_"><text:span text:style-name="T352">.</text:span></text:span><text:span text:style-name="_3c_C_2b__2b__3e_"><text:span text:style-name="T684">second</text:span></text:span><text:span text:style-name="_3c_C_3e_"><text:span text:style-name="T648"><text:tab/><text:tab/><text:tab/><text:tab/><text:tab/></text:span></text:span><text:span text:style-name="_3c_C_3e_"><text:span text:style-name="T643">-&gt; devuelve el </text:span></text:span><text:span text:style-name="_3c_C_3e_"><text:span text:style-name="T685">segundo</text:span></text:span><text:span text:style-name="_3c_C_3e_"><text:span text:style-name="T643"> elemento de</text:span></text:span><text:span text:style-name="_3c_C_3e_"><text:span text:style-name="T685">l par</text:span></text:span></text:p>
      <text:p text:style-name="P611"><text:span text:style-name="_3c_C_3e_"><text:span text:style-name="T659"/></text:span></text:p>
      <text:p text:style-name="P624"><text:span text:style-name="_3c_C_3e_"><text:span text:style-name="T628">STD::</text:span></text:span><text:span text:style-name="_3c_C_3e_"><text:span text:style-name="T686">SET</text:span></text:span><text:span text:style-name="_3c_C_3e_"><text:span text:style-name="T629"> </text:span></text:span></text:p>
      <text:p text:style-name="P624"><text:span text:style-name="_3c_C_2b__2b__3e_"><text:span text:style-name="T352">#include &lt;</text:span></text:span><text:span text:style-name="_3c_C_2b__2b__3e_"><text:span text:style-name="T687">set</text:span></text:span><text:span text:style-name="_3c_C_2b__2b__3e_"><text:span text:style-name="T352">&gt;</text:span></text:span></text:p>
      <text:p text:style-name="P624"><text:span text:style-name="_3c_C_3e_"><text:span text:style-name="T679">Es una colección que al ser insertados los elementos automáticamente son ordenados en su forma de ordenación de cada tipo con el operador &lt; o el que se le pase. No permite duplicados. Y la inserción de elementos es O(log n)</text:span></text:span><text:span text:style-name="_3c_C_3e_"><text:span text:style-name="T688">. No tiene operador .at ni [].</text:span></text:span></text:p>
      <text:p text:style-name="P624"><text:span text:style-name="_3c_C_3e_"><text:span text:style-name="T659"/></text:span></text:p>
      <text:p text:style-name="P624"><text:span text:style-name="_3c_C_2b__2b__3e_"><text:span text:style-name="T352">std::</text:span></text:span><text:span text:style-name="_3c_C_2b__2b__3e_"><text:span text:style-name="T687">set</text:span></text:span><text:span text:style-name="_3c_C_3e_"><text:span text:style-name="T352">&lt;type&gt; variable;</text:span></text:span></text:p>
      <text:p text:style-name="P611"><text:span text:style-name="_3c_C_3e_"><text:span text:style-name="T659"/></text:span></text:p>
      <text:p text:style-name="P625"><text:span text:style-name="_3c_C_3e_"><text:span text:style-name="T689">Lo de arriba ordenará los elementos con el operator&lt; por defecto, PERO podemos elegir la forma de ordenar implicitamente:<text:line-break/><text:line-break/></text:span></text:span><text:span text:style-name="_3c_C_2b__2b__3e_"><text:span text:style-name="T352">std::</text:span></text:span><text:span text:style-name="_3c_C_2b__2b__3e_"><text:span text:style-name="T687">set</text:span></text:span><text:span text:style-name="_3c_C_3e_"><text:span text:style-name="T352">&lt;type</text:span></text:span><text:span text:style-name="_3c_C_3e_"><text:span text:style-name="T690">, </text:span></text:span><text:span text:style-name="_3c_C_2b__2b__3e_"><text:span text:style-name="T352">std::less&lt;type&gt;</text:span></text:span><text:span text:style-name="_3c_C_3e_"><text:span text:style-name="T352">&gt; variable;</text:span></text:span><text:span text:style-name="_2f__2f_C"><text:span text:style-name="T690"> //Ordenará como por defecto el operator&lt;</text:span></text:span></text:p>
      <text:p text:style-name="P625"><text:soft-page-break/><text:span text:style-name="_3c_C_2b__2b__3e_"><text:span text:style-name="T352">std::</text:span></text:span><text:span text:style-name="_3c_C_2b__2b__3e_"><text:span text:style-name="T687">set</text:span></text:span><text:span text:style-name="_3c_C_3e_"><text:span text:style-name="T352">&lt;type</text:span></text:span><text:span text:style-name="_3c_C_3e_"><text:span text:style-name="T690">, </text:span></text:span><text:span text:style-name="_3c_C_2b__2b__3e_"><text:span text:style-name="T352">std::greater&lt;type&gt;</text:span></text:span><text:span text:style-name="_3c_C_3e_"><text:span text:style-name="T352">&gt; variable;</text:span></text:span><text:span text:style-name="_3c_C_3e_"><text:span text:style-name="T690"> </text:span></text:span><text:span text:style-name="_2f__2f_C"><text:span text:style-name="T690">//Ordenará de Mayor a menor</text:span></text:span></text:p>
      <text:p text:style-name="P625"><text:span text:style-name="_3c_C_2b__2b__3e_"><text:span text:style-name="T352">std::</text:span></text:span><text:span text:style-name="_3c_C_2b__2b__3e_"><text:span text:style-name="T687">set</text:span></text:span><text:span text:style-name="_3c_C_3e_"><text:span text:style-name="T352">&lt;type</text:span></text:span><text:span text:style-name="_3c_C_3e_"><text:span text:style-name="T690">, </text:span></text:span><text:span text:style-name="_3c_C_2b__2b__3e_"><text:span text:style-name="T690">funcion</text:span></text:span><text:span text:style-name="_3c_C_3e_"><text:span text:style-name="T352">&gt; variable;</text:span></text:span><text:span text:style-name="_3c_C_3e_"><text:span text:style-name="T690"> </text:span></text:span><text:span text:style-name="_2f__2f_C"><text:span text:style-name="T352">//Ordenará </text:span></text:span><text:span text:style-name="_2f__2f_C"><text:span text:style-name="T690">con el m</text:span></text:span><text:span text:style-name="_2f__2f_C"><text:span text:style-name="T691">é</text:span></text:span><text:span text:style-name="_2f__2f_C"><text:span text:style-name="T690">todo implementado en funcion</text:span></text:span></text:p>
      <text:p text:style-name="P611"><text:span text:style-name="_3c_C_3e_"><text:span text:style-name="T659"/></text:span></text:p>
      <text:p text:style-name="P626"><text:span text:style-name="_3c_C_3e_"><text:span text:style-name="T642">MODIFICADORES</text:span></text:span><text:span text:style-name="_3c_C_3e_"><text:span text:style-name="T643">:</text:span></text:span></text:p>
      <text:p text:style-name="P626"><text:span text:style-name="_3c_C_2b__2b__3e_"><text:span text:style-name="T352">.</text:span></text:span><text:span text:style-name="_3c_C_2b__2b__3e_"><text:span text:style-name="T655">insert</text:span></text:span><text:span text:style-name="_3c_C_2b__2b__3e_"><text:span text:style-name="T352">(</text:span></text:span><text:span text:style-name="_3c_C_2b__2b__3e_"><text:span text:style-name="T655">elemen</text:span></text:span><text:span text:style-name="_3c_C_2b__2b__3e_"><text:span text:style-name="T692">to</text:span></text:span><text:span text:style-name="_3c_C_2b__2b__3e_"><text:span text:style-name="T352">)</text:span></text:span><text:span text:style-name="_3c_C_2b__2b__3e_"><text:span text:style-name="T645"><text:tab/></text:span></text:span><text:span text:style-name="_3c_C_2b__2b__3e_"><text:span text:style-name="T692"><text:tab/><text:tab/><text:tab/></text:span></text:span><text:span text:style-name="_3c_C_3e_"><text:span text:style-name="T643">-&gt; </text:span></text:span><text:span text:style-name="_3c_C_3e_"><text:span text:style-name="T653">pone elemento</text:span></text:span><text:span text:style-name="_3c_C_3e_"><text:span text:style-name="T693"> en la</text:span></text:span><text:span text:style-name="_3c_C_3e_"><text:span text:style-name="T654"> colecci</text:span></text:span><text:span text:style-name="_3c_C_3e_"><text:span text:style-name="T656">ón</text:span></text:span><text:span text:style-name="_3c_C_3e_"><text:span text:style-name="T653">.</text:span></text:span><text:span text:style-name="_3c_C_3e_"><text:span text:style-name="T654"> O(</text:span></text:span><text:span text:style-name="_3c_C_3e_"><text:span text:style-name="T693">log n</text:span></text:span><text:span text:style-name="_3c_C_3e_"><text:span text:style-name="T654">)</text:span></text:span><text:span text:style-name="_3c_C_3e_"><text:span text:style-name="T694"> y devolver</text:span></text:span><text:span text:style-name="_3c_C_3e_"><text:span text:style-name="T695">á un </text:span></text:span><text:span text:style-name="_3c_C_3e_"><text:span text:style-name="T696"><text:tab/><text:tab/><text:tab/><text:tab/><text:tab/><text:tab/><text:tab/><text:tab/><text:tab/><text:tab/><text:tab/><text:tab/><text:tab/><text:tab/></text:span></text:span><text:span text:style-name="_3c_C_3e_"><text:span text:style-name="T352">std::pair</text:span></text:span><text:span text:style-name="_3c_C_3e_"><text:span text:style-name="T695"> sobre el resultado de la inserción como [ it_pos, true </text:span></text:span><text:span text:style-name="_3c_C_3e_"><text:span text:style-name="T696"><text:tab/><text:tab/><text:tab/><text:tab/><text:tab/><text:tab/><text:tab/><text:tab/><text:tab/><text:tab/><text:tab/></text:span></text:span><text:span text:style-name="_3c_C_3e_"><text:span text:style-name="T695">o false]</text:span></text:span><text:span text:style-name="_3c_C_3e_"><text:span text:style-name="T696">. Pudiendo acceder al primer elemento como <text:tab/><text:tab/><text:tab/><text:tab/><text:tab/><text:tab/><text:tab/><text:tab/><text:tab/><text:tab/><text:tab/><text:tab/><text:tab/><text:tab/><text:tab/></text:span></text:span><text:span text:style-name="_3c_C_3e_"><text:span text:style-name="T352">*coleccion.first</text:span></text:span><text:span text:style-name="_3c_C_3e_"><text:span text:style-name="T696"> y al segundo como </text:span></text:span><text:span text:style-name="_3c_C_3e_"><text:span text:style-name="T352">collection.second</text:span></text:span></text:p>
      <text:p text:style-name="P626"><text:span text:style-name="_3c_C_2b__2b__3e_"><text:span text:style-name="T352">.</text:span></text:span><text:span text:style-name="_3c_C_2b__2b__3e_"><text:span text:style-name="T692">erase</text:span></text:span><text:span text:style-name="_3c_C_2b__2b__3e_"><text:span text:style-name="T352">(</text:span></text:span><text:span text:style-name="_3c_C_2b__2b__3e_"><text:span text:style-name="T655">elemen</text:span></text:span><text:span text:style-name="_3c_C_2b__2b__3e_"><text:span text:style-name="T692">to</text:span></text:span><text:span text:style-name="_3c_C_2b__2b__3e_"><text:span text:style-name="T352">)</text:span></text:span><text:span text:style-name="_3c_C_2b__2b__3e_"><text:span text:style-name="T645"><text:tab/></text:span></text:span><text:span text:style-name="_3c_C_2b__2b__3e_"><text:span text:style-name="T692"><text:tab/><text:tab/><text:tab/></text:span></text:span><text:span text:style-name="_3c_C_3e_"><text:span text:style-name="T643">-&gt; </text:span></text:span><text:span text:style-name="_3c_C_3e_"><text:span text:style-name="T693">quita el</text:span></text:span><text:span text:style-name="_3c_C_3e_"><text:span text:style-name="T653"> elemento</text:span></text:span><text:span text:style-name="_3c_C_3e_"><text:span text:style-name="T693"> de la</text:span></text:span><text:span text:style-name="_3c_C_3e_"><text:span text:style-name="T654"> colecci</text:span></text:span><text:span text:style-name="_3c_C_3e_"><text:span text:style-name="T656">ón</text:span></text:span><text:span text:style-name="_3c_C_3e_"><text:span text:style-name="T653">.</text:span></text:span><text:span text:style-name="_3c_C_3e_"><text:span text:style-name="T654"> O(</text:span></text:span><text:span text:style-name="_3c_C_3e_"><text:span text:style-name="T693">log n</text:span></text:span><text:span text:style-name="_3c_C_3e_"><text:span text:style-name="T654">)</text:span></text:span></text:p>
      <text:p text:style-name="P626"><text:span text:style-name="_3c_C_2b__2b__3e_"><text:span text:style-name="T352">.</text:span></text:span><text:span text:style-name="_3c_C_2b__2b__3e_"><text:span text:style-name="T692">erase</text:span></text:span><text:span text:style-name="_3c_C_2b__2b__3e_"><text:span text:style-name="T352">(</text:span></text:span><text:span text:style-name="_3c_C_2b__2b__3e_"><text:span text:style-name="T692">iterador</text:span></text:span><text:span text:style-name="_3c_C_2b__2b__3e_"><text:span text:style-name="T352">)</text:span></text:span><text:span text:style-name="_3c_C_2b__2b__3e_"><text:span text:style-name="T645"><text:tab/></text:span></text:span><text:span text:style-name="_3c_C_2b__2b__3e_"><text:span text:style-name="T692"><text:tab/><text:tab/><text:tab/></text:span></text:span><text:span text:style-name="_3c_C_3e_"><text:span text:style-name="T643">-&gt; </text:span></text:span><text:span text:style-name="_3c_C_3e_"><text:span text:style-name="T693">quita el</text:span></text:span><text:span text:style-name="_3c_C_3e_"><text:span text:style-name="T653"> elemento</text:span></text:span><text:span text:style-name="_3c_C_3e_"><text:span text:style-name="T693"> de la</text:span></text:span><text:span text:style-name="_3c_C_3e_"><text:span text:style-name="T654"> colecci</text:span></text:span><text:span text:style-name="_3c_C_3e_"><text:span text:style-name="T656">ón</text:span></text:span><text:span text:style-name="_3c_C_3e_"><text:span text:style-name="T653">.</text:span></text:span><text:span text:style-name="_3c_C_3e_"><text:span text:style-name="T654"> O(</text:span></text:span><text:span text:style-name="_3c_C_3e_"><text:span text:style-name="T693">1</text:span></text:span><text:span text:style-name="_3c_C_3e_"><text:span text:style-name="T654">)</text:span></text:span></text:p>
      <text:p text:style-name="P626"><text:span text:style-name="_3c_C_2b__2b__3e_"><text:span text:style-name="T352">.</text:span></text:span><text:span text:style-name="_3c_C_2b__2b__3e_"><text:span text:style-name="T663">clear</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64">vacia toda la colecci</text:span></text:span><text:span text:style-name="_3c_C_3e_"><text:span text:style-name="T665">ó</text:span></text:span><text:span text:style-name="_3c_C_3e_"><text:span text:style-name="T664">n y lo deja con un size de 0</text:span></text:span></text:p>
      <text:p text:style-name="P626"><text:span text:style-name="_3c_C_2b__2b__3e_"><text:span text:style-name="T352">.</text:span></text:span><text:span text:style-name="_3c_C_2b__2b__3e_"><text:span text:style-name="T658">size</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text:span></text:span><text:span text:style-name="_3c_C_3e_"><text:span text:style-name="T670"> la colecci</text:span></text:span><text:span text:style-name="_3c_C_3e_"><text:span text:style-name="T671">ón</text:span></text:span></text:p>
      <text:p text:style-name="P626"><text:span text:style-name="_3c_C_2b__2b__3e_"><text:span text:style-name="T352">.</text:span></text:span><text:span text:style-name="_3c_C_2b__2b__3e_"><text:span text:style-name="T692">find</text:span></text:span><text:span text:style-name="_3c_C_2b__2b__3e_"><text:span text:style-name="T352">(</text:span></text:span><text:span text:style-name="_3c_C_2b__2b__3e_"><text:span text:style-name="T692">elemento</text:span></text:span><text:span text:style-name="_3c_C_2b__2b__3e_"><text:span text:style-name="T352">)</text:span></text:span><text:span text:style-name="_3c_C_2b__2b__3e_"><text:span text:style-name="T645"><text:tab/><text:tab/></text:span></text:span><text:span text:style-name="_3c_C_2b__2b__3e_"><text:span text:style-name="T658"><text:tab/><text:tab/></text:span></text:span><text:span text:style-name="_3c_C_3e_"><text:span text:style-name="T643">-&gt; </text:span></text:span><text:span text:style-name="_3c_C_3e_"><text:span text:style-name="T659">devuelve </text:span></text:span><text:span text:style-name="_3c_C_3e_"><text:span text:style-name="T688">iterador al elementos si existe, end() si no. O(log n)</text:span></text:span></text:p>
      <text:p text:style-name="P626"><text:span text:style-name="_3c_C_2b__2b__3e_"><text:span text:style-name="T352">.</text:span></text:span><text:span text:style-name="_3c_C_2b__2b__3e_"><text:span text:style-name="T692">count</text:span></text:span><text:span text:style-name="_3c_C_2b__2b__3e_"><text:span text:style-name="T352">(</text:span></text:span><text:span text:style-name="_3c_C_2b__2b__3e_"><text:span text:style-name="T692">elemento</text:span></text:span><text:span text:style-name="_3c_C_2b__2b__3e_"><text:span text:style-name="T352">)</text:span></text:span><text:span text:style-name="_3c_C_2b__2b__3e_"><text:span text:style-name="T645"><text:tab/><text:tab/></text:span></text:span><text:span text:style-name="_3c_C_2b__2b__3e_"><text:span text:style-name="T658"><text:tab/><text:tab/></text:span></text:span><text:span text:style-name="_3c_C_3e_"><text:span text:style-name="T643">-&gt; </text:span></text:span><text:span text:style-name="_3c_C_3e_"><text:span text:style-name="T659">d</text:span></text:span><text:span text:style-name="_3c_C_3e_"><text:span text:style-name="T688">evuelve 0 o 1 si existe el elemento o no.</text:span></text:span></text:p>
      <text:p text:style-name="P626"><text:span text:style-name="_3c_C_3e_"><text:span text:style-name="T688"/></text:span></text:p>
      <text:p text:style-name="P626"><text:span text:style-name="_3c_C_3e_"><text:span text:style-name="T659"/></text:span></text:p>
      <text:p text:style-name="P627"><text:span text:style-name="_3c_C_3e_"><text:span text:style-name="T628">STD::</text:span></text:span><text:span text:style-name="_3c_C_3e_"><text:span text:style-name="T697">MAP</text:span></text:span><text:span text:style-name="_3c_C_3e_"><text:span text:style-name="T629"> </text:span></text:span></text:p>
      <text:p text:style-name="P627"><text:span text:style-name="_3c_C_2b__2b__3e_"><text:span text:style-name="T352">#include &lt;</text:span></text:span><text:span text:style-name="_3c_C_2b__2b__3e_"><text:span text:style-name="T698">map</text:span></text:span><text:span text:style-name="_3c_C_2b__2b__3e_"><text:span text:style-name="T352">&gt;</text:span></text:span></text:p>
      <text:p text:style-name="P627"><text:span text:style-name="_3c_C_3e_"><text:span text:style-name="T679">Es una colección que a</text:span></text:span><text:span text:style-name="_3c_C_3e_"><text:span text:style-name="T699">lberga varios </text:span></text:span><text:span text:style-name="_3c_C_3e_"><text:span text:style-name="T352">std::pair</text:span></text:span><text:span text:style-name="_3c_C_3e_"><text:span text:style-name="T699"> de datos siendo el primero una key o llave que a la hora de serle pasado por el operador </text:span></text:span><text:span text:style-name="_3c_C_3e_"><text:span text:style-name="T352">[]</text:span></text:span><text:span text:style-name="_3c_C_3e_"><text:span text:style-name="T699"> devuelve el valor del segundo parametro del par. Ordenará de forma automática como </text:span></text:span><text:span text:style-name="_3c_C_3e_"><text:span text:style-name="T352">set</text:span></text:span><text:span text:style-name="_3c_C_3e_"><text:span text:style-name="T699"> en orden creciente de la Key, por defecto, y como </text:span></text:span><text:span text:style-name="_3c_C_3e_"><text:span text:style-name="T352">set</text:span></text:span><text:span text:style-name="_3c_C_3e_"><text:span text:style-name="T699">, no alberga valores repetidos de key, pero si que puede albergar valores repetidos del valor de dicha key.</text:span></text:span></text:p>
      <text:p text:style-name="P627"><text:span text:style-name="_3c_C_3e_"><text:span text:style-name="T699"/></text:span></text:p>
      <text:p text:style-name="P627"><text:span text:style-name="_3c_C_2b__2b__3e_"><text:span text:style-name="T352">std::map</text:span></text:span><text:span text:style-name="_3c_C_3e_"><text:span text:style-name="T352">&lt;type1, type2&gt; variable;</text:span></text:span></text:p>
      <text:p text:style-name="P626"><text:span text:style-name="_3c_C_3e_"><text:span text:style-name="T659"/></text:span></text:p>
      <text:p text:style-name="P628"><text:span text:style-name="_3c_C_3e_"><text:span text:style-name="T700">Para insertar un elemento en C++98 se puede hacer:</text:span></text:span></text:p>
      <text:p text:style-name="P628"><text:span text:style-name="_3c_C_3e_"><text:span text:style-name="T700"/></text:span></text:p>
      <text:p text:style-name="P628"><text:span text:style-name="_3c_C_3e_"><text:span text:style-name="T352">std::map&lt;int, std::string&gt; m;</text:span></text:span></text:p>
      <text:p text:style-name="P628"><text:span text:style-name="_3c_C_3e_"><text:span text:style-name="T352">m</text:span></text:span><text:span text:style-name="_3c_C_2b__2b__3e_"><text:span text:style-name="T352">.insert</text:span></text:span><text:span text:style-name="_3c_C_3e_"><text:span text:style-name="T352">(std::pair&lt;int, std::string&gt;(1, "uno");</text:span></text:span></text:p>
      <text:p text:style-name="P628"><text:span text:style-name="_3c_C_3e_"><text:span text:style-name="T352">m.</text:span></text:span><text:span text:style-name="_3c_C_2b__2b__3e_"><text:span text:style-name="T352">insert</text:span></text:span><text:span text:style-name="_3c_C_3e_"><text:span text:style-name="T352">(std::make_pair(2, "dos"):</text:span></text:span></text:p>
      <text:p text:style-name="P628"><text:span text:style-name="_3c_C_3e_"><text:span text:style-name="T352">m[3] = "tres";</text:span></text:span></text:p>
      <text:p text:style-name="P628"><text:span text:style-name="_3c_C_3e_"><text:span text:style-name="T352"/></text:span></text:p>
      <text:p text:style-name="P628"><text:span text:style-name="_3c_C_3e_"><text:span text:style-name="T700">En cuanto a las llaves no tienen que ser consecutivas. Por ejemplo podemos almacenar los FD (file descriptor) y estos no tienen por que empezar en 0, 1, 2... sino que puede empezar en 23.. o lo que sea.</text:span></text:span></text:p>
      <text:p text:style-name="P626"><text:span text:style-name="_3c_C_3e_"><text:span text:style-name="T659"/></text:span></text:p>
      <text:p text:style-name="P629"><text:soft-page-break/><text:span text:style-name="_3c_C_3e_"><text:span text:style-name="T701">Para acceder a los elementos, no podemos hacerlo con [i], ya que como hemos dicho ese i, no es consecutivo y por lo tanto el tercer elemento no tendr</text:span></text:span><text:span text:style-name="_3c_C_3e_"><text:span text:style-name="T702">í</text:span></text:span><text:span text:style-name="_3c_C_3e_"><text:span text:style-name="T701">a que ser "2", sino que ese i, es la key introducida, que podria ser por ejemplo 123 si la primera es 24, y la segunda 42.…<text:line-break/>Para ello creamos un iterador:<text:line-break/><text:line-break/></text:span></text:span><text:span text:style-name="_3c_C_2b__2b__3e_"><text:span text:style-name="T352">std::map</text:span></text:span><text:span text:style-name="_3c_C_3e_"><text:span text:style-name="T352">&lt;int, std::string&gt;::iterator it = m.begin();</text:span></text:span></text:p>
      <text:p text:style-name="P629"><text:span text:style-name="_3c_C_2b__2b__3e_"><text:span text:style-name="T352">std::advance</text:span></text:span><text:span text:style-name="_3c_C_3e_"><text:span text:style-name="T352">(it, 2); </text:span></text:span><text:span text:style-name="_2f__2f_C"><text:span text:style-name="T352">//avanza al tercer elemento</text:span></text:span><text:span text:style-name="_2f__2f_C"><text:span text:style-name="T703"> (0-index)</text:span></text:span></text:p>
      <text:p text:style-name="P629"><text:span text:style-name="_3c_C_3e_"><text:span text:style-name="T352">std::cout &lt;&lt; </text:span></text:span><text:span text:style-name="_3c_C_2b__2b__3e_"><text:span text:style-name="T352">it-&gt;second;</text:span></text:span><text:span text:style-name="_2f__2f_C"><text:span text:style-name="T352"> //ahí sí que accedemos al segundo par del tercer elemento.</text:span></text:span><text:span text:style-name="_3c_C_3e_"><text:span text:style-name="T701"><text:line-break/></text:span></text:span></text:p>
      <text:p text:style-name="P626"><text:span text:style-name="_3c_C_3e_"><text:span text:style-name="T659"/></text:span></text:p>
      <text:p text:style-name="P626"><text:span text:style-name="_3c_C_3e_"><text:span text:style-name="T659"/></text:span></text:p>
      <text:p text:style-name="P630"><text:span text:style-name="_3c_C_3e_"><text:span text:style-name="T628">STD::</text:span></text:span><text:span text:style-name="_3c_C_3e_"><text:span text:style-name="T704">ARRAY</text:span></text:span><text:span text:style-name="_3c_C_3e_"><text:span text:style-name="T705"> es C++11!!!</text:span></text:span><text:span text:style-name="_3c_C_3e_"><text:span text:style-name="T629"> . Secuencial</text:span></text:span></text:p>
      <text:p text:style-name="P630"><text:span text:style-name="_3c_C_2b__2b__3e_"><text:span text:style-name="T352">#include &lt;</text:span></text:span><text:span text:style-name="_3c_C_2b__2b__3e_"><text:span text:style-name="T706">array</text:span></text:span><text:span text:style-name="_3c_C_2b__2b__3e_"><text:span text:style-name="T352">&gt;</text:span></text:span></text:p>
      <text:p text:style-name="P630"><text:span text:style-name="_3c_C_3e_"><text:span text:style-name="T707">Crea una colecci</text:span></text:span><text:span text:style-name="_3c_C_3e_"><text:span text:style-name="T708">ón</text:span></text:span><text:span text:style-name="_3c_C_3e_"><text:span text:style-name="T707"> de elementos pero con un tamaño espec</text:span></text:span><text:span text:style-name="_3c_C_3e_"><text:span text:style-name="T708">íf</text:span></text:span><text:span text:style-name="_3c_C_3e_"><text:span text:style-name="T707">ico que no se puede alterar despu</text:span></text:span><text:span text:style-name="_3c_C_3e_"><text:span text:style-name="T708">és</text:span></text:span><text:span text:style-name="_3c_C_3e_"><text:span text:style-name="T709"> y por lo tanto no se puede hacer </text:span></text:span><text:span text:style-name="_3c_C_3e_"><text:span text:style-name="T352">.pop_back()</text:span></text:span><text:span text:style-name="_3c_C_3e_"><text:span text:style-name="T707">.</text:span></text:span><text:span text:style-name="_3c_C_3e_"><text:span text:style-name="T710"> Su uso es:</text:span></text:span></text:p>
      <text:p text:style-name="P630"><text:span text:style-name="_3c_C_3e_"><text:span text:style-name="T710"/></text:span></text:p>
      <text:p text:style-name="P631"><text:span text:style-name="_3c_C_2b__2b__3e_"><text:span text:style-name="T352">std::array&lt;int, 3&gt;</text:span></text:span><text:span text:style-name="_3c_C_3e_"><text:span text:style-name="T352"> int_array;</text:span></text:span><text:span text:style-name="_2f__2f_C"><text:span text:style-name="T352"> // creará un array de 3 números enteros.</text:span></text:span></text:p>
      <text:p text:style-name="P631"><text:span text:style-name="_3c_C_2b__2b__3e_"><text:span text:style-name="T352">std::array&lt;</text:span></text:span><text:span text:style-name="_3c_C_3e_"><text:span text:style-name="T352">int, 3</text:span></text:span><text:span text:style-name="_3c_C_2b__2b__3e_"><text:span text:style-name="T352">&gt;</text:span></text:span><text:span text:style-name="_3c_C_3e_"><text:span text:style-name="T352"> int_array{1, 2};</text:span></text:span><text:span text:style-name="_2f__2f_C"><text:span text:style-name="T352"> //será (1, 2, 0)</text:span></text:span><text:span text:style-name="_2f__2f_C"><text:span text:style-name="T711">. C++11!!!</text:span></text:span></text:p>
      <text:p text:style-name="P632"><text:span text:style-name="_3c_C_3e_"><text:span text:style-name="T642"/></text:span></text:p>
      <text:p text:style-name="P632"><text:span text:style-name="_3c_C_3e_"><text:span text:style-name="T642">MODIFICADORES</text:span></text:span><text:span text:style-name="_3c_C_3e_"><text:span text:style-name="T643">:</text:span></text:span></text:p>
      <text:p text:style-name="P632"><text:span text:style-name="_3c_C_2b__2b__3e_"><text:span text:style-name="T352">.at(indice)</text:span></text:span><text:span text:style-name="_3c_C_2b__2b__3e_"><text:span text:style-name="T644"><text:tab/></text:span></text:span><text:span text:style-name="_3c_C_2b__2b__3e_"><text:span text:style-name="T645"><text:tab/><text:tab/><text:tab/><text:tab/><text:tab/></text:span></text:span><text:span text:style-name="_3c_C_3e_"><text:span text:style-name="T643">-&gt; devuelve el valor del </text:span></text:span><text:span text:style-name="_3c_C_3e_"><text:span text:style-name="T712">Array</text:span></text:span><text:span text:style-name="_3c_C_3e_"><text:span text:style-name="T643"> en dicho </text:span></text:span><text:span text:style-name="_3c_C_3e_"><text:span text:style-name="T646">ín</text:span></text:span><text:span text:style-name="_3c_C_3e_"><text:span text:style-name="T643">dice</text:span></text:span><text:span text:style-name="_3c_C_3e_"><text:span text:style-name="T647">. seria como </text:span></text:span><text:span text:style-name="_3c_C_3e_"><text:span text:style-name="T648"><text:tab/><text:tab/><text:tab/><text:tab/><text:tab/><text:tab/><text:tab/><text:tab/><text:tab/><text:tab/><text:tab/><text:tab/><text:tab/></text:span></text:span><text:span text:style-name="_3c_C_3e_"><text:span text:style-name="T647">var[indice] pero<text:tab/>esta no hace comprobaci</text:span></text:span><text:span text:style-name="_3c_C_3e_"><text:span text:style-name="T649">ón</text:span></text:span><text:span text:style-name="_3c_C_3e_"><text:span text:style-name="T647"> de rango y </text:span></text:span><text:span text:style-name="_3c_C_3e_"><text:span text:style-name="T352">.at</text:span></text:span><text:span text:style-name="_3c_C_3e_"><text:span text:style-name="T647"> s</text:span></text:span><text:span text:style-name="_3c_C_3e_"><text:span text:style-name="T649">í</text:span></text:span><text:span text:style-name="_3c_C_3e_"><text:span text:style-name="T647"> </text:span></text:span><text:span text:style-name="_3c_C_3e_"><text:span text:style-name="T648"><text:tab/><text:tab/><text:tab/><text:tab/><text:tab/><text:tab/><text:tab/><text:tab/><text:tab/><text:tab/><text:tab/><text:tab/></text:span></text:span><text:span text:style-name="_3c_C_3e_"><text:span text:style-name="T647">que lo hace lanzan</text:span></text:span><text:span text:style-name="_3c_C_3e_"><text:span text:style-name="T713"> </text:span></text:span><text:span text:style-name="_3c_C_3e_"><text:span text:style-name="T647">do</text:span></text:span><text:span text:style-name="_3c_C_3e_"><text:span text:style-name="T648"> una </text:span></text:span><text:span text:style-name="_3c_C_3e_"><text:span text:style-name="T647">excepci</text:span></text:span><text:span text:style-name="_3c_C_3e_"><text:span text:style-name="T649">ón</text:span></text:span><text:span text:style-name="_3c_C_3e_"><text:span text:style-name="T647">. </text:span></text:span><text:span text:style-name="_3c_C_3e_"><text:span text:style-name="T352">out_of_range</text:span></text:span></text:p>
      <text:p text:style-name="P632"><text:span text:style-name="_3c_C_2b__2b__3e_"><text:span text:style-name="T352">.front()</text:span></text:span><text:span text:style-name="_3c_C_3e_"><text:span text:style-name="T643"><text:tab/><text:tab/><text:tab/></text:span></text:span><text:span text:style-name="_3c_C_3e_"><text:span text:style-name="T648"><text:tab/><text:tab/><text:tab/><text:tab/><text:tab/></text:span></text:span><text:span text:style-name="_3c_C_3e_"><text:span text:style-name="T643">-&gt; devuelve el primer elemento del </text:span></text:span><text:span text:style-name="_3c_C_3e_"><text:span text:style-name="T712">array</text:span></text:span></text:p>
      <text:p text:style-name="P632"><text:span text:style-name="_3c_C_2b__2b__3e_"><text:span text:style-name="T352">.back()<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el </text:span></text:span><text:span text:style-name="_3c_C_3e_"><text:span text:style-name="T646">ú</text:span></text:span><text:span text:style-name="_3c_C_3e_"><text:span text:style-name="T643">ltimo elemento del </text:span></text:span><text:span text:style-name="_3c_C_3e_"><text:span text:style-name="T712">array</text:span></text:span><text:span text:style-name="_3c_C_3e_"><text:span text:style-name="T643">.</text:span></text:span></text:p>
      <text:p text:style-name="P632"><text:span text:style-name="_3c_C_2b__2b__3e_"><text:span text:style-name="T352">.</text:span></text:span><text:span text:style-name="_3c_C_2b__2b__3e_"><text:span text:style-name="T650">data</text:span></text:span><text:span text:style-name="_3c_C_2b__2b__3e_"><text:span text:style-name="T352">()<text:tab/></text:span></text:span><text:span text:style-name="_3c_C_3e_"><text:span text:style-name="T643"><text:tab/><text:tab/></text:span></text:span><text:span text:style-name="_3c_C_3e_"><text:span text:style-name="T648"><text:tab/><text:tab/><text:tab/><text:tab/><text:tab/></text:span></text:span><text:span text:style-name="_3c_C_3e_"><text:span text:style-name="T643">-&gt; devuelve </text:span></text:span><text:span text:style-name="_3c_C_3e_"><text:span text:style-name="T651">el puntero al primer elemento del </text:span></text:span><text:span text:style-name="_3c_C_3e_"><text:span text:style-name="T712">array</text:span></text:span><text:span text:style-name="_3c_C_3e_"><text:span text:style-name="T651">.</text:span></text:span></text:p>
      <text:p text:style-name="P632"><text:span text:style-name="_3c_C_2b__2b__3e_"><text:span text:style-name="T352">.</text:span></text:span><text:span text:style-name="_3c_C_2b__2b__3e_"><text:span text:style-name="T714">fill</text:span></text:span><text:span text:style-name="_3c_C_2b__2b__3e_"><text:span text:style-name="T352">(</text:span></text:span><text:span text:style-name="_3c_C_2b__2b__3e_"><text:span text:style-name="T652">elemento</text:span></text:span><text:span text:style-name="_3c_C_2b__2b__3e_"><text:span text:style-name="T352">)</text:span></text:span><text:span text:style-name="_3c_C_2b__2b__3e_"><text:span text:style-name="T645"><text:tab/></text:span></text:span><text:span text:style-name="_3c_C_2b__2b__3e_"><text:span text:style-name="T714"><text:tab/><text:tab/><text:tab/><text:tab/></text:span></text:span><text:span text:style-name="_3c_C_3e_"><text:span text:style-name="T643">-&gt; </text:span></text:span><text:span text:style-name="_3c_C_3e_"><text:span text:style-name="T715">Sobreescribe </text:span></text:span><text:span text:style-name="_3c_C_3e_"><text:span text:style-name="T716">TODO</text:span></text:span><text:span text:style-name="_3c_C_3e_"><text:span text:style-name="T715"> el Array con ese valor</text:span></text:span><text:span text:style-name="_3c_C_3e_"><text:span text:style-name="T717"> de elemento</text:span></text:span><text:span text:style-name="_3c_C_3e_"><text:span text:style-name="T715">.</text:span></text:span><text:span text:style-name="_3c_C_3e_"><text:span text:style-name="T716"> </text:span></text:span></text:p>
      <text:p text:style-name="P632"><text:span text:style-name="_3c_C_2b__2b__3e_"><text:span text:style-name="T352">.</text:span></text:span><text:span text:style-name="_3c_C_2b__2b__3e_"><text:span text:style-name="T658">size</text:span></text:span><text:span text:style-name="_3c_C_2b__2b__3e_"><text:span text:style-name="T352">()<text:tab/></text:span></text:span><text:span text:style-name="_3c_C_2b__2b__3e_"><text:span text:style-name="T645"><text:tab/><text:tab/><text:tab/><text:tab/><text:tab/></text:span></text:span><text:span text:style-name="_3c_C_2b__2b__3e_"><text:span text:style-name="T658"><text:tab/><text:tab/></text:span></text:span><text:span text:style-name="_3c_C_3e_"><text:span text:style-name="T643">-&gt; </text:span></text:span><text:span text:style-name="_3c_C_3e_"><text:span text:style-name="T659">devuelve el n</text:span></text:span><text:span text:style-name="_3c_C_3e_"><text:span text:style-name="T660">úmero de </text:span></text:span><text:span text:style-name="_3c_C_3e_"><text:span text:style-name="T659">elementos del vector</text:span></text:span></text:p>
      <text:p text:style-name="P631"><text:span text:style-name="_2f__2f_C"><text:span text:style-name="T711"/></text:span></text:p>
      <text:p text:style-name="P631"><text:span text:style-name="_2f__2f_C"><text:span text:style-name="T711"/></text:span></text:p>
      <text:p text:style-name="P633"><text:span text:style-name="_3c_C_3e_"><text:span text:style-name="T718"/></text:span></text:p>
      <text:p text:style-name="P633"><text:span text:style-name="_3c_C_3e_"><text:span text:style-name="T718">ITERADORES</text:span></text:span></text:p>
      <text:p text:style-name="P633"><text:span text:style-name="_3c_C_3e_"><text:span text:style-name="T719">Un contenedor no garantiza (solo array y vector) que las posiciones de memoria de sus elementos est</text:span></text:span><text:span text:style-name="_3c_C_3e_"><text:span text:style-name="T720">é</text:span></text:span><text:span text:style-name="_3c_C_3e_"><text:span text:style-name="T719">n de forma continua. Por eso no se puede garantizar tener la direcci</text:span></text:span><text:span text:style-name="_3c_C_3e_"><text:span text:style-name="T720">ón de memoria del primer elemento del contenedor y hacer aritmética de punteros para acceder a los siguientes o anteriores elementos. <text:line-break/>Para ello están los iteradores, que son una tabla de indices con direcciones de memoria para acceder a la posición de memoria de cada elemento aunque no esté de forma continua.</text:span></text:span></text:p>
      <text:p text:style-name="P633"><text:soft-page-break/><text:span text:style-name="_3c_C_3e_"><text:span text:style-name="T720"/></text:span></text:p>
      <text:p text:style-name="P634"><text:span text:style-name="_3c_C_3e_"><text:span text:style-name="T352">std::vector&lt;int&gt; ints1{1, 2, 3, 4, 8}; //C++11</text:span></text:span></text:p>
      <text:p text:style-name="P634"><text:span text:style-name="_3c_C_2b__2b__3e_"><text:span text:style-name="T352">std::vector&lt;int&gt;::iterator </text:span></text:span><text:span text:style-name="_3c_C_3e_"><text:span text:style-name="T352">it<text:tab/>= ints1.begin()</text:span></text:span></text:p>
      <text:p text:style-name="P634"><text:span text:style-name="_3c_C_2b__2b__3e_"><text:span text:style-name="T352">std::vector&lt;int&gt;::iterator </text:span></text:span><text:span text:style-name="_3c_C_3e_"><text:span text:style-name="T352">end_it = ints1.end(); </text:span></text:span><text:span text:style-name="_2f__2f_C"><text:span text:style-name="T352">//apunta a direccion pasado ultimo elemento</text:span></text:span></text:p>
      <text:p text:style-name="P635"><text:span text:style-name="_3c_C_3e_"><text:span text:style-name="T721">std::cout &lt;&lt; </text:span></text:span><text:span text:style-name="_3c_C_2b__2b__3e_"><text:span text:style-name="T352">*it;</text:span></text:span><text:span text:style-name="_3c_C_3e_"><text:span text:style-name="T721"> </text:span></text:span><text:span text:style-name="_2f__2f_C"><text:span text:style-name="T721">//dereferencia el primer elemento que muestra "1"</text:span></text:span></text:p>
      <text:p text:style-name="P635"><text:span text:style-name="_3c_C_2b__2b__3e_"><text:span text:style-name="T352">++it; </text:span></text:span><text:span text:style-name="_2f__2f_C"><text:span text:style-name="T721">//imitará el comportamiento de aritmética de punteros aunque no estén continuos</text:span></text:span></text:p>
      <text:p text:style-name="P635"><text:span text:style-name="_2f__2f_C"><text:span text:style-name="T721"/></text:span></text:p>
      <text:p text:style-name="P636"><text:span text:style-name="_3c_C_3e_"><text:span text:style-name="T722">Para imprimir todo el contenido de un contenedor podemos hacer esto con ese iterador (it)</text:span></text:span></text:p>
      <text:p text:style-name="P636"><text:span text:style-name="_3c_C_3e_"><text:span text:style-name="T722"/></text:span></text:p>
      <text:p text:style-name="P636"><text:span text:style-name="_3c_C_3e_"><text:span text:style-name="T352">template &lt;typename T&gt;</text:span></text:span></text:p>
      <text:p text:style-name="P636"><text:span text:style-name="_3c_C_3e_"><text:span text:style-name="T352">void print_collection(const T&amp; collection){</text:span></text:span></text:p>
      <text:p text:style-name="P636"><text:span text:style-name="_3c_C_2b__2b__3e_"><text:span text:style-name="T352"><text:tab/>typename T::const_iterator it = collection.begin();</text:span></text:span><text:span text:style-name="_3c_C_2b__2b__3e_"><text:span text:style-name="T723"> </text:span></text:span><text:span text:style-name="_2f__2f_C"><text:span text:style-name="T723">//tiene que ser const_iterator por que recibe una coleccion const que no se puede alterar y eso lo garantiza const_iterator que es de C++98 tambien y garantiza que no se pueda hacer *it = "otro valor"</text:span></text:span></text:p>
      <text:p text:style-name="P637"><text:span text:style-name="_2f__2f_C"><text:span text:style-name="T724">//la linea anterior si hubiera sido C++11 podria haber sido:<text:line-break/>//auto it = collection.begin();</text:span></text:span></text:p>
      <text:p text:style-name="P638"><text:span text:style-name="_3c_C_3e_"><text:span text:style-name="T352"><text:tab/>std::cout &lt;&lt; " [";</text:span></text:span></text:p>
      <text:p text:style-name="P638"><text:span text:style-name="_3c_C_3e_"><text:span text:style-name="T352"><text:tab/>while (it != collection.end()){</text:span></text:span></text:p>
      <text:p text:style-name="P638"><text:span text:style-name="_3c_C_3e_"><text:span text:style-name="T352"><text:tab/><text:tab/>std::cout &lt;&lt; " " &lt;&lt; *it;</text:span></text:span></text:p>
      <text:p text:style-name="P638"><text:span text:style-name="_3c_C_3e_"><text:span text:style-name="T352"><text:tab/><text:tab/>++it;</text:span></text:span></text:p>
      <text:p text:style-name="P638"><text:span text:style-name="_3c_C_3e_"><text:span text:style-name="T352"><text:tab/>}</text:span></text:span></text:p>
      <text:p text:style-name="P638"><text:span text:style-name="_3c_C_3e_"><text:span text:style-name="T352"><text:tab/>std::cout &lt;&lt; "]" &lt;&lt; std::endl;</text:span></text:span></text:p>
      <text:p text:style-name="P638"><text:span text:style-name="_3c_C_3e_"><text:span text:style-name="T352">}</text:span></text:span></text:p>
      <text:p text:style-name="P638"><text:span text:style-name="_3c_C_3e_"><text:span text:style-name="T352"/></text:span></text:p>
      <text:p text:style-name="P639"><text:span text:style-name="_3c_C_3e_"><text:span text:style-name="T725">CONST</text:span></text:span><text:span text:style-name="_3c_C_3e_"><text:span text:style-name="T726"> </text:span></text:span><text:span text:style-name="_3c_C_3e_"><text:span text:style-name="T718">ITERADORES</text:span></text:span></text:p>
      <text:p text:style-name="P639"><text:span text:style-name="_3c_C_3e_"><text:span text:style-name="T727">Para garantizar el que no se pueda alterar el contenido de una colecci</text:span></text:span><text:span text:style-name="_3c_C_3e_"><text:span text:style-name="T728">ón</text:span></text:span><text:span text:style-name="_3c_C_3e_"><text:span text:style-name="T727">, se pueden usar los const_iterators. </text:span></text:span></text:p>
      <text:p text:style-name="P639"><text:span text:style-name="_3c_C_3e_"><text:span text:style-name="T727"/></text:span></text:p>
      <text:p text:style-name="P639"><text:span text:style-name="_3c_C_3e_"><text:span text:style-name="T352">std::vector&lt;float&gt;::</text:span></text:span><text:span text:style-name="_3c_C_2b__2b__3e_"><text:span text:style-name="T352">const_iterator</text:span></text:span><text:span text:style-name="_3c_C_3e_"><text:span text:style-name="T352"> it = coleccion.begin();</text:span></text:span></text:p>
      <text:p text:style-name="P639"><text:span text:style-name="_3c_C_3e_"><text:span text:style-name="T352">*it = 8.2f;</text:span></text:span><text:span text:style-name="_2f__2f_C"><text:span text:style-name="T352"> //error de compilación. ya que no se puede alterar.</text:span></text:span></text:p>
      <text:p text:style-name="P639"><text:span text:style-name="_2f__2f_C"><text:span text:style-name="T352"/></text:span></text:p>
      <text:p text:style-name="P639"><text:span text:style-name="_3c_C_3e_"><text:span text:style-name="T727">Eso es para C++98, pero para C++11 es mucho m</text:span></text:span><text:span text:style-name="_3c_C_3e_"><text:span text:style-name="T728">á</text:span></text:span><text:span text:style-name="_3c_C_3e_"><text:span text:style-name="T727">s c</text:span></text:span><text:span text:style-name="_3c_C_3e_"><text:span text:style-name="T728">óm</text:span></text:span><text:span text:style-name="_3c_C_3e_"><text:span text:style-name="T727">odo de declarar un iterador:</text:span></text:span></text:p>
      <text:p text:style-name="P639"><text:span text:style-name="_3c_C_3e_"><text:span text:style-name="T727"/></text:span></text:p>
      <text:p text:style-name="P639"><text:span text:style-name="_3c_C_2b__2b__3e_"><text:span text:style-name="T352">auto</text:span></text:span><text:span text:style-name="_3c_C_3e_"><text:span text:style-name="T352"> it = coleccion</text:span></text:span><text:span text:style-name="_3c_C_2b__2b__3e_"><text:span text:style-name="T352">.begin();</text:span></text:span><text:span text:style-name="_3c_C_3e_"><text:span text:style-name="T352"> </text:span></text:span><text:span text:style-name="_2f__2f_C"><text:span text:style-name="T352">//iterador que puede ser alterado el elemento</text:span></text:span></text:p>
      <text:p text:style-name="P639"><text:span text:style-name="_3c_C_2b__2b__3e_"><text:span text:style-name="T352">auto</text:span></text:span><text:span text:style-name="_3c_C_3e_"><text:span text:style-name="T352"> it = coleccion</text:span></text:span><text:span text:style-name="_3c_C_2b__2b__3e_"><text:span text:style-name="T352">.cbegin()</text:span></text:span><text:span text:style-name="_3c_C_3e_"><text:span text:style-name="T352">; </text:span></text:span><text:span text:style-name="_2f__2f_C"><text:span text:style-name="T352">//iterador que NO puede ser alterado el elemento</text:span></text:span></text:p>
      <text:p text:style-name="P640"><text:span text:style-name="_3c_C_2b__2b__3e_"><text:span text:style-name="T352">auto</text:span></text:span><text:span text:style-name="_3c_C_3e_"><text:span text:style-name="T352"> it = coleccion.</text:span></text:span><text:span text:style-name="_3c_C_2b__2b__3e_"><text:span text:style-name="T352">crbegin()</text:span></text:span><text:span text:style-name="_3c_C_3e_"><text:span text:style-name="T352">; </text:span></text:span><text:span text:style-name="_2f__2f_C"><text:span text:style-name="T352">//iterador </text:span></text:span><text:span text:style-name="_2f__2f_C"><text:span text:style-name="T729">reverso </text:span></text:span><text:span text:style-name="_2f__2f_C"><text:span text:style-name="T352">que NO puede ser alterado el elemento</text:span></text:span></text:p>
      <text:p text:style-name="P640"><text:soft-page-break/><text:span text:style-name="_2f__2f_C"><text:span text:style-name="T352"/></text:span></text:p>
      <text:p text:style-name="P640"><text:span text:style-name="_3c_C_3e_"><text:span text:style-name="T730">Evidentemente si se hace una coleccion </text:span></text:span><text:span text:style-name="_3c_C_3e_"><text:span text:style-name="T352">const coleccion</text:span></text:span><text:span text:style-name="_3c_C_3e_"><text:span text:style-name="T730">, entonces aunque creemos un iterador normal no podr</text:span></text:span><text:span text:style-name="_3c_C_3e_"><text:span text:style-name="T731">í</text:span></text:span><text:span text:style-name="_3c_C_3e_"><text:span text:style-name="T730">a alterar el contenido de igual manera.</text:span></text:span><text:span text:style-name="_3c_C_3e_"><text:span text:style-name="T732"> Aunque lo declaremos con ::iterator, nos devolver</text:span></text:span><text:span text:style-name="_3c_C_3e_"><text:span text:style-name="T733">í</text:span></text:span><text:span text:style-name="_3c_C_3e_"><text:span text:style-name="T732">a un </text:span></text:span><text:span text:style-name="_3c_C_3e_"><text:span text:style-name="T352">const_iterator.</text:span></text:span></text:p>
      <text:p text:style-name="P641"><text:span text:style-name="_3c_C_3e_"><text:span text:style-name="T726"/></text:span></text:p>
      <text:p text:style-name="P641"><text:span text:style-name="_3c_C_3e_"><text:span text:style-name="T726">REVERSE </text:span></text:span><text:span text:style-name="_3c_C_3e_"><text:span text:style-name="T718">ITERADORES</text:span></text:span></text:p>
      <text:p text:style-name="P641"><text:span text:style-name="_3c_C_3e_"><text:span text:style-name="T734">Se puede iterar reversamente con ::reverse_iterator, pero cada ++ en el lo que har</text:span></text:span><text:span text:style-name="_3c_C_3e_"><text:span text:style-name="T735">á</text:span></text:span><text:span text:style-name="_3c_C_3e_"><text:span text:style-name="T734"> es ir para atr</text:span></text:span><text:span text:style-name="_3c_C_3e_"><text:span text:style-name="T735">á</text:span></text:span><text:span text:style-name="_3c_C_3e_"><text:span text:style-name="T734">s:</text:span></text:span></text:p>
      <text:p text:style-name="P641"><text:span text:style-name="_3c_C_3e_"><text:span text:style-name="T734"/></text:span></text:p>
      <text:p text:style-name="P641"><text:span text:style-name="_3c_C_3e_"><text:span text:style-name="T352">std::vector&lt;int&gt;</text:span></text:span><text:span text:style-name="_3c_C_2b__2b__3e_"><text:span text:style-name="T352">::reverse_iterator </text:span></text:span><text:span text:style-name="_3c_C_3e_"><text:span text:style-name="T352">it = numbers.</text:span></text:span><text:span text:style-name="_3c_C_2b__2b__3e_"><text:span text:style-name="T352">rbegin()</text:span></text:span><text:span text:style-name="_3c_C_3e_"><text:span text:style-name="T352">; </text:span></text:span><text:span text:style-name="_2f__2f_C"><text:span text:style-name="T736">//rbegin() señala el último elemento real</text:span></text:span></text:p>
      <text:p text:style-name="P641"><text:span text:style-name="_3c_C_3e_"><text:span text:style-name="T736">while (it != numbers.rend()){ </text:span></text:span><text:span text:style-name="_2f__2f_C"><text:span text:style-name="T736">//rend() es la posición antes del primer elemento fuera de la colección</text:span></text:span></text:p>
      <text:p text:style-name="P641"><text:span text:style-name="_3c_C_3e_"><text:span text:style-name="T736"><text:tab/>....</text:span></text:span></text:p>
      <text:p text:style-name="P641"><text:span text:style-name="_3c_C_2b__2b__3e_"><text:span text:style-name="T352">++it; </text:span></text:span><text:span text:style-name="_2f__2f_C"><text:span text:style-name="T736">//esto retrodecerá en las direcciones de memoria. NO IRA PARA ADELANTE.</text:span></text:span></text:p>
      <text:p text:style-name="P642"><text:span text:style-name="_3c_C_3e_"><text:span text:style-name="T736">}<text:line-break/></text:span></text:span></text:p>
      <text:p text:style-name="P642"><text:span text:style-name="_3c_C_3e_"><text:span text:style-name="T737">NO SE PODRIA HACER ESTO, YA QUE </text:span></text:span><text:span text:style-name="_3c_C_3e_"><text:span text:style-name="T352">end()</text:span></text:span><text:span text:style-name="_3c_C_3e_"><text:span text:style-name="T737"> y </text:span></text:span><text:span text:style-name="_3c_C_3e_"><text:span text:style-name="T352">begin() </text:span></text:span><text:span text:style-name="_3c_C_3e_"><text:span text:style-name="T737">son m</text:span></text:span><text:span text:style-name="_3c_C_3e_"><text:span text:style-name="T738">é</text:span></text:span><text:span text:style-name="_3c_C_3e_"><text:span text:style-name="T737">todos solo de </text:span></text:span><text:span text:style-name="_3c_C_2b__2b__3e_"><text:span text:style-name="T352">iterator</text:span></text:span><text:span text:style-name="_3c_C_3e_"><text:span text:style-name="T737">. De </text:span></text:span><text:span text:style-name="_3c_C_2b__2b__3e_"><text:span text:style-name="T352">reverse_iterator</text:span></text:span><text:span text:style-name="_3c_C_3e_"><text:span text:style-name="T737"> son </text:span></text:span><text:span text:style-name="_3c_C_3e_"><text:span text:style-name="T352">rbegin() </text:span></text:span><text:span text:style-name="_3c_C_3e_"><text:span text:style-name="T737">y</text:span></text:span><text:span text:style-name="_3c_C_3e_"><text:span text:style-name="T352"> rend()</text:span></text:span><text:span text:style-name="_3c_C_3e_"><text:span text:style-name="T737">.</text:span></text:span><text:span text:style-name="_3c_C_3e_"><text:span text:style-name="T736"><text:line-break/></text:span></text:span><text:span text:style-name="_3c_C_3e_"><text:span text:style-name="T352">std::vector&lt;int&gt;</text:span></text:span><text:span text:style-name="_3c_C_2b__2b__3e_"><text:span text:style-name="T352">::reverse_iterator </text:span></text:span><text:span text:style-name="_3c_C_3e_"><text:span text:style-name="T352">it = numbers.end() - 1 ;</text:span></text:span><text:span text:style-name="T739"> </text:span></text:p>
      <text:p text:style-name="P643"/>
      <text:p text:style-name="P644"><text:span text:style-name="_3c_C_3e_"><text:span text:style-name="T740">Se podria haber hecho un reverse con un iterador normal asi:</text:span></text:span></text:p>
      <text:p text:style-name="P645"><text:span text:style-name="_3c_C_3e_"><text:span text:style-name="T352">for (T:</text:span></text:span><text:span text:style-name="_3c_C_2b__2b__3e_"><text:span text:style-name="T352">:iterator </text:span></text:span><text:span text:style-name="_3c_C_3e_"><text:span text:style-name="T352">it =</text:span></text:span><text:span text:style-name="_3c_C_2b__2b__3e_"><text:span text:style-name="T352"> --c.end()</text:span></text:span><text:span text:style-name="_3c_C_3e_"><text:span text:style-name="T352">; it != </text:span></text:span><text:span text:style-name="_3c_C_2b__2b__3e_"><text:span text:style-name="T352">c.begin();</text:span></text:span><text:span text:style-name="_3c_C_3e_"><text:span text:style-name="T352"> </text:span></text:span><text:span text:style-name="_3c_C_2b__2b__3e_"><text:span text:style-name="T352">--it</text:span></text:span><text:span text:style-name="_3c_C_3e_"><text:span text:style-name="T352">) {</text:span></text:span></text:p>
      <text:p text:style-name="Preformatted_20_Text"><text:span text:style-name="_3c_C_3e_"><text:s text:c="4"/>// Procesar *it</text:span></text:p>
      <text:p text:style-name="P646"><text:span text:style-name="_3c_C_3e_">}</text:span></text:p>
      <text:p text:style-name="P646"><text:span text:style-name="_3c_C_3e_"/></text:p>
      <text:p text:style-name="P647"><text:span text:style-name="_3c_C_3e_"><text:span text:style-name="T741">ABRIR UN ARCHIVO</text:span></text:span></text:p>
      <text:p text:style-name="P647"><text:span text:style-name="_3c_C_3e_"><text:span text:style-name="T742">Para abrirlo:<text:line-break/></text:span></text:span><text:span text:style-name="_3c_C_2b__2b__3e_"><text:span text:style-name="T352">#include &lt;fstream&gt;</text:span></text:span></text:p>
      <text:p text:style-name="P647"><text:span text:style-name="_3c_C_2b__2b__3e_"><text:span text:style-name="T352">std::ifstream</text:span></text:span><text:span text:style-name="_3c_C_3e_"><text:span text:style-name="T352"><text:tab/>inputFile(“nombreFichero.txt”); </text:span></text:span><text:span text:style-name="_2f__2f_C"><text:span text:style-name="T352">//inputFile puede ser cuarquier nombre.</text:span></text:span></text:p>
      <text:p text:style-name="P647"><text:span text:style-name="_3c_C_3e_"><text:span text:style-name="T352">if (!inputFile.is_open())</text:span></text:span></text:p>
      <text:p text:style-name="P647"><text:span text:style-name="_3c_C_3e_"><text:span text:style-name="T352"><text:tab/>throw std::runtime_error(“Error….);</text:span></text:span></text:p>
      <text:p text:style-name="P647"><text:span text:style-name="_3c_C_3e_"><text:span text:style-name="T352">std::string line;</text:span></text:span></text:p>
      <text:p text:style-name="P647"><text:span text:style-name="_3c_C_2b__2b__3e_"><text:span text:style-name="T743">while (</text:span></text:span><text:span text:style-name="_3c_C_2b__2b__3e_"><text:span text:style-name="T352">std::getline</text:span></text:span><text:span text:style-name="_3c_C_3e_"><text:span text:style-name="T352">(inputFile, line)</text:span></text:span><text:span text:style-name="_3c_C_3e_"><text:span text:style-name="T743">)</text:span></text:span><text:span text:style-name="_3c_C_3e_"><text:span text:style-name="T352"> </text:span></text:span><text:span text:style-name="_2f__2f_C"><text:span text:style-name="T352">//sacará </text:span></text:span><text:span text:style-name="_2f__2f_C"><text:span text:style-name="T743">cada</text:span></text:span><text:span text:style-name="_2f__2f_C"><text:span text:style-name="T352"> linea hasta el /n y la guarda en line.</text:span></text:span></text:p>
      <text:p text:style-name="P6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6-24T20:44:23.745537400</dc:date>
    <meta:editing-duration>P4DT4H35M26S</meta:editing-duration>
    <meta:editing-cycles>613</meta:editing-cycles>
    <meta:generator>LibreOffice/25.2.7.2$Windows_X86_64 LibreOffice_project/5cbfd1ab6520636bb5f7b99185aa69bd7456825d</meta:generator>
    <meta:document-statistic meta:table-count="0" meta:image-count="0" meta:object-count="0" meta:page-count="66" meta:paragraph-count="1722" meta:word-count="15937" meta:character-count="98979" meta:non-whitespace-character-count="83404"/>
  </office:meta>
</office:document-meta>
</file>